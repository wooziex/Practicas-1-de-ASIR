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12.598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analizar los datos y su seguridad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Realice los siguientes apartados:</text:p>
                <text:p text:style-name="P7"/>
                <text:p text:style-name="P8"><text:span text:style-name="Strong_20_Emphasis"><text:span text:style-name="T4">RA05_b) Se ha descrito el ciclo de vida del dato.</text:span></text:span></text:p>
                <text:p text:style-name="P3">Indica 2 ejemplos de:</text:p>
                <text:list text:style-name="L1">
                  <text:list-item>
                    <text:p text:style-name="P9">Un dato en transito</text:p>
                  </text:list-item>
                  <text:list-item>
                    <text:p text:style-name="P10">Un dato en reposo</text:p>
                  </text:list-item>
                </text:list>
                <text:p text:style-name="P4"> </text:p>
                <text:p text:style-name="P8"><text:span text:style-name="Strong_20_Emphasis"><text:span text:style-name="T4">RA05_e) Se han descrito las etapas típicas de la ciencia de datos y su relación en el proceso.</text:span></text:span></text:p>
                <text:p text:style-name="P3">Indica tres medidas de seguridad informaticas para datos.</text:p>
                <text:p text:style-name="P4"> </text:p>
                <text:p text:style-name="P8"><text:span text:style-name="Strong_20_Emphasis"><text:span text:style-name="T4">RA05_f) Se han descrito los procedimientos de almacenaje de datos en la cloud/nube.</text:span></text:span></text:p>
                <text:p text:style-name="P3">Investiga un ejemplo real de Cloud comercial en indica:</text:p>
                <text:list text:style-name="L2">
                  <text:list-item>
                    <text:p text:style-name="P11">Su web</text:p>
                  </text:list-item>
                  <text:list-item>
                    <text:p text:style-name="P11">Ubicacion</text:p>
                  </text:list-item>
                  <text:list-item>
                    <text:p text:style-name="P11">Algunas caracteristicas que oferten (3 o 4)</text:p>
                  </text:list-item>
                  <text:list-item>
                    <text:p text:style-name="P12">Listado de precios (si tiene)<text:span text:style-name="T3"/></text:p>
                  </text:list-item>
                </text:list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ext:p text:style-name="P13">Para realizar esta tarea es aconsejable revisar en el temario los puntos:</text:p>
          <text:list text:style-name="L3">
            <text:list-item>
              <text:p text:style-name="P14">Fundamentos de la seguridad de los datos</text:p>
            </text:list-item>
            <text:list-item>
              <text:p text:style-name="P14">Estrategias de defensa en ciberseguridad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19:21.267783200</meta:creation-date>
    <dc:date>2026-06-16T05:19:39.103055800</dc:date>
    <meta:editing-duration>PT18S</meta:editing-duration>
    <meta:editing-cycles>1</meta:editing-cycles>
    <meta:document-statistic meta:table-count="3" meta:image-count="0" meta:object-count="0" meta:page-count="1" meta:paragraph-count="26" meta:word-count="163" meta:character-count="924" meta:non-whitespace-character-count="789"/>
    <meta:generator>LibreOffice/26.2.3.2$Windows_X86_64 LibreOffice_project/70e089b17412e4cb7773e41413306b17a2328c34</meta:generator>
  </office:meta>
</office:document-meta>
</file>