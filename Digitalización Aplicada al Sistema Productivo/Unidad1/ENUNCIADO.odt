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7cm"/>
    </style:style>
    <style:style style:name="Tabla1.1" style:family="table-row">
      <style:table-row-properties fo:background-color="#fcfdfe">
        <style:background-image/>
      </style:table-row-properties>
    </style:style>
    <style:style style:name="Tabla1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1.A2" style:family="table-cell">
      <style:table-cell-properties style:vertical-align="middle" fo:padding="0.049cm" fo:border="0.5pt solid #d4e0e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17cm"/>
    </style:style>
    <style:style style:name="Tabla2.1" style:family="table-row">
      <style:table-row-properties fo:background-color="#fcfdfe">
        <style:background-image/>
      </style:table-row-properties>
    </style:style>
    <style:style style:name="Tabla2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2.A2" style:family="table-cell">
      <style:table-cell-properties style:vertical-align="middle" fo:padding="0.049cm" fo:border="0.5pt solid #d4e0ee"/>
    </style:style>
    <style:style style:name="Tabla3" style:family="table">
      <style:table-properties style:width="15.436cm" table:align="left"/>
    </style:style>
    <style:style style:name="Tabla3.A" style:family="table-column">
      <style:table-column-properties style:column-width="15.436cm"/>
    </style:style>
    <style:style style:name="Tabla3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2" style:family="paragraph" style:parent-style-name="Table_20_Heading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 style:font-name="HelveticaNeue-Light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12pt" fo:letter-spacing="normal" fo:font-style="normal" fo:font-weight="normal" style:font-name-asian="HelveticaNeue-Light" style:font-size-asian="12pt" style:font-style-asian="normal" style:font-weight-asian="normal" style:font-name-complex="HelveticaNeue-Light" style:font-size-complex="12pt" style:font-style-complex="normal" style:font-weight-complex="normal" loext:padding="0cm" loext:border="non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Table_20_Contents">
      <style:paragraph-properties fo:margin-top="0cm" fo:margin-bottom="0.499cm" style:contextual-spacing="false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able_20_Contents" style:list-style-name="L1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10" style:family="paragraph" style:parent-style-name="Table_20_Contents" style:list-style-name="L1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11" style:family="paragraph" style:parent-style-name="Table_20_Contents" style:list-style-name="L2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12" style:family="paragraph" style:parent-style-name="Table_20_Contents" style:list-style-name="L2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13" style:family="paragraph" style:parent-style-name="Table_20_Contents" style:list-style-name="L3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14" style:family="paragraph" style:parent-style-name="Table_20_Contents" style:list-style-name="L3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12pt" fo:letter-spacing="normal" fo:font-style="normal" fo:font-weight="normal" loext:padding="0cm" loext:border="none"/>
    </style:style>
    <style:style style:name="T1" style:family="text">
      <style:text-properties fo:color="#153152" loext:opacity="100%" style:font-name="HelveticaNeue-Light" fo:font-size="18pt" fo:font-weight="bold"/>
    </style:style>
    <style:style style:name="T2" style:family="text">
      <style:text-properties fo:color="#153152" loext:opacity="100%" style:font-name="HelveticaNeue-Light" fo:font-size="18pt" fo:font-weight="bold" style:font-name-asian="HelveticaNeue-Light" style:font-weight-asian="bold" style:font-name-complex="HelveticaNeue-Light" style:font-weight-complex="bold"/>
    </style:style>
    <style:style style:name="T3" style:family="text">
      <style:text-properties fo:color="#555555" loext:opacity="100%" style:font-name="HelveticaNeue-Light" style:font-name-asian="HelveticaNeue-Light" style:font-name-complex="HelveticaNeue-Light"/>
    </style:style>
    <style:style style:name="T4" style:family="text">
      <style:text-properties fo:color="#555555" loext:opacity="100%" style:font-name="HelveticaNeue-Light"/>
    </style:style>
    <style:style style:name="T5" style:family="text">
      <style:text-properties fo:color="#153152" loext:opacity="100%" style:font-name="HelveticaNeue-Light" fo:font-size="14pt" fo:font-weight="bold"/>
    </style:style>
    <style:style style:name="T6" style:family="text">
      <style:text-properties fo:color="#153152" loext:opacity="100%" style:font-name="HelveticaNeue-Light" fo:font-size="14pt" fo:font-weight="bold" style:font-name-asian="HelveticaNeue-Light" style:font-weight-asian="bold" style:font-name-complex="HelveticaNeue-Light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id24">
        <text:section text:style-name="Sect1" text:name="ta24_1">
          <text:p text:style-name="P1">Introducción de la tarea</text:p>
          <table:table table:name="Tabla1" table:style-name="Tabla1">
            <table:table-column table:style-name="Tabla1.A"/>
            <table:table-row table:style-name="Tabla1.1">
              <table:table-cell table:style-name="Tabla1.A1" office:value-type="string">
                <text:p text:style-name="P2"><text:span text:style-name="Strong_20_Emphasis"><text:span text:style-name="T1">CONTEXTO DE LA TAREA</text:span></text:span><text:span text:style-name="T2"/></text:p>
              </table:table-cell>
            </table:table-row>
            <table:table-row table:style-name="Tabla1.1">
              <table:table-cell table:style-name="Tabla1.A2" office:value-type="string">
                <text:p text:style-name="P3">Con esta tarea aprenderemos a identificar los departamentos típicos de las empresas que pueden constituir entornos IT y a seleccionar las tecnologías típicas de la digitalización en planta y en negocio.</text:p>
                <text:p text:style-name="P4"> <text:span text:style-name="T3"/></text:p>
              </table:table-cell>
            </table:table-row>
          </table:table>
          <text:p text:style-name="P5"/>
        </text:section>
      </text:section>
      <text:section text:style-name="Sect1" text:name="id25">
        <text:p text:style-name="P6"/>
        <text:section text:style-name="Sect1" text:name="ta25_1">
          <text:p text:style-name="P1">¿Qué debes hacer?</text:p>
          <table:table table:name="Tabla2" table:style-name="Tabla2">
            <table:table-column table:style-name="Tabla2.A"/>
            <table:table-row table:style-name="Tabla2.1">
              <table:table-cell table:style-name="Tabla2.A1" office:value-type="string">
                <text:p text:style-name="P2"><text:span text:style-name="Strong_20_Emphasis"><text:span text:style-name="T1">ENUNCIADO DE LA TAREA</text:span></text:span><text:span text:style-name="T2"/></text:p>
              </table:table-cell>
            </table:table-row>
            <table:table-row table:style-name="Tabla2.1">
              <table:table-cell table:style-name="Tabla2.A2" office:value-type="string">
                <text:p text:style-name="P3">Realice los siguientes apartados:</text:p>
                <text:p text:style-name="P7"/>
                <text:p text:style-name="P8"><text:span text:style-name="Strong_20_Emphasis"><text:span text:style-name="T4">RA1_d) Se han identificado los departamentos típicos de las empresas que pueden constituir entornos IT.</text:span></text:span></text:p>
                <text:p text:style-name="P3"><text:line-break/>Describe como afectaría el proceso de digitalizacion a una academia de formación indicando:</text:p>
                <text:list text:style-name="L1">
                  <text:list-item>
                    <text:p text:style-name="P9">Tecnologias implicadas</text:p>
                  </text:list-item>
                  <text:list-item>
                    <text:p text:style-name="P9">Ventajas e inconvenientes</text:p>
                  </text:list-item>
                  <text:list-item>
                    <text:p text:style-name="P10">Que procesos dejarias analogicos y cuales planterias en un futuro digitalizar a corto plazo ademas de los indicados.</text:p>
                  </text:list-item>
                </text:list>
                <text:p text:style-name="P3">Investiga en Internet e indica (con enlace) un proceso de digitalización o transformación digital de exito y comentalo brevemente.</text:p>
                <text:p text:style-name="P7"/>
                <text:p text:style-name="P8"><text:span text:style-name="Strong_20_Emphasis"><text:span text:style-name="T4">RA1_e) Se han seleccionado las tecnologías típicas de la digitalización en planta y en negocio.</text:span></text:span></text:p>
                <text:p text:style-name="P7"/>
                <text:p text:style-name="P3">Describe brevemente con tus propiuas palabras los conceptos de:</text:p>
                <text:list text:style-name="L2">
                  <text:list-item>
                    <text:p text:style-name="P11">bigdata</text:p>
                  </text:list-item>
                  <text:list-item>
                    <text:p text:style-name="P11">IoT</text:p>
                  </text:list-item>
                  <text:list-item>
                    <text:p text:style-name="P12">BlockChain</text:p>
                  </text:list-item>
                </text:list>
                <text:p text:style-name="P3">Indica un ejemplo de:</text:p>
                <text:list text:style-name="L3">
                  <text:list-item>
                    <text:p text:style-name="P13">IaaS</text:p>
                  </text:list-item>
                  <text:list-item>
                    <text:p text:style-name="P13">PaaS</text:p>
                  </text:list-item>
                  <text:list-item>
                    <text:p text:style-name="P13">SaaS</text:p>
                  </text:list-item>
                  <text:list-item>
                    <text:p text:style-name="P13">Nube pública</text:p>
                  </text:list-item>
                  <text:list-item>
                    <text:p text:style-name="P14">Nube privada</text:p>
                  </text:list-item>
                </text:list>
                <text:p text:style-name="P3">Accede a alguna herramienta de IA y realiza alguna pregunta mostrando el resultado.<text:span text:style-name="T3"/></text:p>
              </table:table-cell>
            </table:table-row>
          </table:table>
          <text:p text:style-name="P5"/>
        </text:section>
      </text:section>
      <text:section text:style-name="Sect1" text:name="id26">
        <text:p text:style-name="P6"/>
        <text:section text:style-name="Sect1" text:name="ta26_1">
          <text:p text:style-name="P1">¿Qué debes tener en cuenta para resolver la tarea?</text:p>
          <table:table table:name="Tabla3" table:style-name="Tabla3">
            <table:table-column table:style-name="Tabla3.A"/>
            <table:table-row>
              <table:table-cell table:style-name="Tabla3.A1" office:value-type="string">
                <text:p text:style-name="P2"><text:span text:style-name="Strong_20_Emphasis"><text:span text:style-name="T5">CONSEJOS Y RECOMENDACIONES PARA REALIZAR LA TAREA</text:span></text:span><text:span text:style-name="T6"/></text:p>
              </table:table-cell>
            </table:table-row>
          </table:table>
          <text:p text:style-name="P15"><text:soft-page-break/>Para realizar esta tarea es aconsejable seguir los siguientes pasos:</text:p>
          <text:p text:style-name="P15">Para resolver los puntos relativos a redes es conveniente revisar en el temario los puntos "Inteligencia Artificial y Aprendizaje Autónomo" y "Cloud Computing".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6T05:15:17.446203300</meta:creation-date>
    <dc:date>2026-06-16T05:15:25.562064500</dc:date>
    <meta:editing-duration>PT8S</meta:editing-duration>
    <meta:editing-cycles>1</meta:editing-cycles>
    <meta:document-statistic meta:table-count="3" meta:image-count="0" meta:object-count="0" meta:page-count="2" meta:paragraph-count="29" meta:word-count="231" meta:character-count="1462" meta:non-whitespace-character-count="1268"/>
    <meta:generator>LibreOffice/26.2.3.2$Windows_X86_64 LibreOffice_project/70e089b17412e4cb7773e41413306b17a2328c34</meta:generator>
  </office:meta>
</office:document-meta>
</file>