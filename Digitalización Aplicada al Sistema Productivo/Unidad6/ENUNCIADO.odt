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5.436cm" table:align="left"/>
    </style:style>
    <style:style style:name="Tabla3.A" style:family="table-column">
      <style:table-column-properties style:column-width="15.436cm"/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top="0cm" fo:margin-bottom="0.499cm" style:contextual-spacing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555555" loext:opacity="100%" style:font-name="HelveticaNeue-Light"/>
    </style:style>
    <style:style style:name="T5" style:family="text">
      <style:text-properties fo:color="#153152" loext:opacity="100%" style:font-name="HelveticaNeue-Light" fo:font-size="14pt" fo:font-weight="bold"/>
    </style:style>
    <style:style style:name="T6" style:family="text">
      <style:text-properties fo:color="#153152" loext:opacity="100%" style:font-name="HelveticaNeue-Light" fo:font-size="14pt" fo:font-weight="bold" style:font-name-asian="HelveticaNeue-Light" style:font-weight-asian="bold" style:font-name-complex="HelveticaNeue-Ligh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Con esta tarea aprenderemos a analizar el proceso de implantación de las THD en la empresa.</text:p>
                <text:p text:style-name="P4"> <text:span text:style-name="T3"/></text:p>
              </table:table-cell>
            </table:table-row>
          </table:table>
          <text:p text:style-name="P5"/>
        </text:section>
      </text:section>
      <text:section text:style-name="Sect1" text:name="id25">
        <text:p text:style-name="P6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2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p text:style-name="P3">Realice los siguientes apartados:</text:p>
                <text:p text:style-name="P7"/>
                <text:p text:style-name="P8"><text:span text:style-name="Strong_20_Emphasis"><text:span text:style-name="T4">RA06_g) Se han analizado las posibles brechas de seguridad en cada una de las áreas.</text:span></text:span></text:p>
                <text:p text:style-name="P3">Busca en Internet información sobre una brecha de seguridad de datos y descríbela: Fecha, causa, ubicación, datos, repercusiones, solución, ....</text:p>
                <text:p text:style-name="P4"> </text:p>
                <text:p text:style-name="P8"><text:span text:style-name="Strong_20_Emphasis"><text:span text:style-name="T4">RA06_h) Se ha definido el tratamiento de los datos y su análisis.</text:span></text:span></text:p>
                <text:p text:style-name="P3">Indica una plataforma o software de análisis de datos y descríbela bervemente.</text:p>
                <text:p text:style-name="P4"> </text:p>
                <text:p text:style-name="P8"><text:span text:style-name="Strong_20_Emphasis"><text:span text:style-name="T4">RA06_i) Se ha tenido en cuenta la integración entre datos, aplicaciones, plataformas que los soportan, entre otros.</text:span></text:span></text:p>
                <text:p text:style-name="P3">¿Qué implica la evaluación de la infraestructura tecnológica en un proyecto de transformación digital?</text:p>
                <text:p text:style-name="P9"/>
                <text:p text:style-name="P8"><text:span text:style-name="Strong_20_Emphasis"><text:span text:style-name="T4">RA06_j) Se han documentado los cambios realizados en función de la estrategia. </text:span></text:span></text:p>
                <text:p text:style-name="P3">¿Qué estrategia se recomienda para realizar ajustes y mejoras en un plan de implementación digital?<text:span text:style-name="T3"/></text:p>
              </table:table-cell>
            </table:table-row>
          </table:table>
          <text:p text:style-name="P5"/>
        </text:section>
      </text:section>
      <text:section text:style-name="Sect1" text:name="id26">
        <text:p text:style-name="P6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>
              <table:table-cell table:style-name="Tabla3.A1" office:value-type="string">
                <text:p text:style-name="P2"><text:span text:style-name="Strong_20_Emphasis"><text:span text:style-name="T5">CONSEJOS Y RECOMENDACIONES PARA REALIZAR LA TAREA</text:span></text:span><text:span text:style-name="T6"/></text:p>
              </table:table-cell>
            </table:table-row>
          </table:table>
          <text:p text:style-name="P10">Para realizar esta tarea es aconsejable revisar en el temario los puntos:</text:p>
          <text:list text:style-name="L1">
            <text:list-item>
              <text:p text:style-name="P11">Planificación del proyecto de transformación digital.</text:p>
            </text:list-item>
            <text:list-item>
              <text:p text:style-name="P11">Estrategias de implementación.</text:p>
            </text:list-item>
            <text:list-item>
              <text:p text:style-name="P11">Medición del impacto y evaluación del proyecto.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6T05:20:31.131273700</meta:creation-date>
    <dc:date>2026-06-16T05:20:33.599342200</dc:date>
    <meta:editing-duration>PT2S</meta:editing-duration>
    <meta:editing-cycles>1</meta:editing-cycles>
    <meta:document-statistic meta:table-count="3" meta:image-count="0" meta:object-count="0" meta:page-count="1" meta:paragraph-count="23" meta:word-count="199" meta:character-count="1280" meta:non-whitespace-character-count="1100"/>
    <meta:generator>LibreOffice/26.2.3.2$Windows_X86_64 LibreOffice_project/70e089b17412e4cb7773e41413306b17a2328c34</meta:generator>
  </office:meta>
</office:document-meta>
</file>