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5.436cm" table:align="left"/>
    </style:style>
    <style:style style:name="Tabla3.A" style:family="table-column">
      <style:table-column-properties style:column-width="15.436cm"/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7" style:family="paragraph" style:parent-style-name="Standard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8" style:family="paragraph" style:parent-style-name="Table_20_Contents">
      <style:paragraph-properties fo:margin-top="0cm" fo:margin-bottom="0.499cm" style:contextual-spacing="fals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able_20_Contents" style:list-style-name="L1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1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T5" style:family="text">
      <style:text-properties fo:color="#153152" loext:opacity="100%" style:font-name="HelveticaNeue-Light" fo:font-size="14pt" fo:font-weight="bold"/>
    </style:style>
    <style:style style:name="T6" style:family="text">
      <style:text-properties fo:color="#153152" loext:opacity="100%" style:font-name="HelveticaNeue-Light" fo:font-size="14pt" fo:font-weight="bold" style:font-name-asian="HelveticaNeue-Light" style:font-weight-asian="bold" style:font-name-complex="HelveticaNeue-Ligh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ain-wrapper">
        <text:section text:style-name="Sect1" text:name="main">
          <text:p text:style-name="P1"/>
          <text:section text:style-name="Sect1" text:name="id24">
            <text:p text:style-name="P1"/>
            <text:section text:style-name="Sect1" text:name="ta24_1">
              <text:p text:style-name="P2">Introducción de la tarea</text:p>
              <table:table table:name="Tabla1" table:style-name="Tabla1">
                <table:table-column table:style-name="Tabla1.A"/>
                <table:table-row table:style-name="Tabla1.1">
                  <table:table-cell table:style-name="Tabla1.A1" office:value-type="string">
                    <text:p text:style-name="P3"><text:span text:style-name="Strong_20_Emphasis"><text:span text:style-name="T1">CONTEXTO DE LA TAREA</text:span></text:span><text:span text:style-name="T2"/></text:p>
                  </table:table-cell>
                </table:table-row>
                <table:table-row table:style-name="Tabla1.1">
                  <table:table-cell table:style-name="Tabla1.A2" office:value-type="string">
                    <text:p text:style-name="P4">Con esta tarea aprenderemos a identificar las THD y su aplicación en diferentes sectores de producción</text:p>
                    <text:p text:style-name="P5"> <text:span text:style-name="T3"/></text:p>
                  </table:table-cell>
                </table:table-row>
              </table:table>
              <text:p text:style-name="P6"/>
            </text:section>
          </text:section>
          <text:section text:style-name="Sect1" text:name="id25">
            <text:p text:style-name="P7"/>
            <text:section text:style-name="Sect1" text:name="ta25_1">
              <text:p text:style-name="P2">¿Qué debes hacer?</text:p>
              <table:table table:name="Tabla2" table:style-name="Tabla2">
                <table:table-column table:style-name="Tabla2.A"/>
                <table:table-row table:style-name="Tabla2.1">
                  <table:table-cell table:style-name="Tabla2.A1" office:value-type="string">
                    <text:p text:style-name="P3"><text:span text:style-name="Strong_20_Emphasis"><text:span text:style-name="T1">ENUNCIADO DE LA TAREA</text:span></text:span><text:span text:style-name="T2"/></text:p>
                  </table:table-cell>
                </table:table-row>
                <table:table-row table:style-name="Tabla2.1">
                  <table:table-cell table:style-name="Tabla2.A2" office:value-type="string">
                    <text:p text:style-name="P4">Realice los siguientes apartados:</text:p>
                    <text:p text:style-name="P8"/>
                    <text:p text:style-name="P9"><text:span text:style-name="Strong_20_Emphasis"><text:span text:style-name="T4">RA2_e)Se ha analizado la implicación de THD tanto en la parte de negocio como en la parte de planta.</text:span></text:span></text:p>
                    <text:p text:style-name="P4"><text:line-break/>Indica algunos ejemplos de integración de las THD en el sector agricola y muestra alguna aplicación en un caso real.</text:p>
                    <text:p text:style-name="P8"/>
                    <text:p text:style-name="P9"><text:span text:style-name="Strong_20_Emphasis"><text:span text:style-name="T4">RA2_g)Se ha elaborado un informe que relacione, las tecnologías con sus características y áreas de aplicación.</text:span></text:span></text:p>
                    <text:p text:style-name="P8"/>
                    <text:p text:style-name="P4">Indica un ejemplo de THD que se puede utilizar para:</text:p>
                    <text:list text:style-name="L1">
                      <text:list-item>
                        <text:p text:style-name="P10">Entrega de paquetes al consumidor</text:p>
                      </text:list-item>
                      <text:list-item>
                        <text:p text:style-name="P10">Gestion entre entidades bancarias</text:p>
                      </text:list-item>
                      <text:list-item>
                        <text:p text:style-name="P10">Formación de empleados</text:p>
                      </text:list-item>
                      <text:list-item>
                        <text:p text:style-name="P11">Salud y seguridad de los empleados</text:p>
                      </text:list-item>
                    </text:list>
                    <text:p text:style-name="P4">Comenta algun caso real donde las THD mejoren la experiencia del cliente en un determinado servicio o producto.<text:span text:style-name="T3"/></text:p>
                  </table:table-cell>
                </table:table-row>
              </table:table>
              <text:p text:style-name="P6"/>
            </text:section>
          </text:section>
          <text:section text:style-name="Sect1" text:name="id26">
            <text:p text:style-name="P7"/>
            <text:section text:style-name="Sect1" text:name="ta26_1">
              <text:p text:style-name="P2">¿Qué debes tener en cuenta para resolver la tarea?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3"><text:span text:style-name="Strong_20_Emphasis"><text:span text:style-name="T5">CONSEJOS Y RECOMENDACIONES PARA REALIZAR LA TAREA</text:span></text:span><text:span text:style-name="T6"/></text:p>
                  </table:table-cell>
                </table:table-row>
              </table:table>
              <text:p text:style-name="P12">Para realizar esta tarea es aconsejable seguir los siguientes pasos:</text:p>
              <text:p text:style-name="P12">Para resolver los puntos relativos a redes es conveniente revisar en el temario los puntos "Identificación y descripción de las THD en el entorno productivo" y "THD en la gestión de la cadena de suministro".</text:p>
            </text:section>
          </text:section>
        </text:section>
      </text:section>
      <text:section text:style-name="Sect1" text:name="bottomPagination">
        <text:p text:style-name="P13"/>
      </text:section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6T05:15:55.612681300</meta:creation-date>
    <dc:date>2026-06-16T05:16:11.236918300</dc:date>
    <meta:editing-duration>PT15S</meta:editing-duration>
    <meta:editing-cycles>1</meta:editing-cycles>
    <meta:document-statistic meta:table-count="3" meta:image-count="0" meta:object-count="0" meta:page-count="1" meta:paragraph-count="21" meta:word-count="201" meta:character-count="1209" meta:non-whitespace-character-count="1028"/>
    <meta:generator>LibreOffice/26.2.3.2$Windows_X86_64 LibreOffice_project/70e089b17412e4cb7773e41413306b17a2328c34</meta:generator>
  </office:meta>
</office:document-meta>
</file>