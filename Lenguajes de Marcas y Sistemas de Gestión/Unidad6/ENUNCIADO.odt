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, sans-serif"/>
    <style:font-face style:name="Courier New" svg:font-family="'Courier New'"/>
    <style:font-face style:name="HelveticaNeue-Light" svg:font-family="HelveticaNeue-Light, 'Helvetica Neue Light', 'Helvetica Neue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7cm"/>
    </style:style>
    <style:style style:name="Tabla1.1" style:family="table-row">
      <style:table-row-properties fo:background-color="#fcfdfe">
        <style:background-image/>
      </style:table-row-properties>
    </style:style>
    <style:style style:name="Tabla1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Tabla1.A2" style:family="table-cell">
      <style:table-cell-properties style:vertical-align="middle" fo:padding="0.049cm" fo:border="0.5pt solid #d4e0e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17cm"/>
    </style:style>
    <style:style style:name="Tabla2.1" style:family="table-row">
      <style:table-row-properties fo:background-color="#fcfdfe">
        <style:background-image/>
      </style:table-row-properties>
    </style:style>
    <style:style style:name="Tabla2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Tabla2.A2" style:family="table-cell">
      <style:table-cell-properties style:vertical-align="middle" fo:padding="0.049cm" fo:border="0.5pt solid #d4e0ee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17cm"/>
    </style:style>
    <style:style style:name="Tabla3.1" style:family="table-row">
      <style:table-row-properties fo:background-color="#fcfdfe">
        <style:background-image/>
      </style:table-row-properties>
    </style:style>
    <style:style style:name="Tabla3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Tabla3.A2" style:family="table-cell">
      <style:table-cell-properties style:vertical-align="middle" fo:padding="0.049cm" fo:border="0.5pt solid #d4e0ee"/>
    </style:style>
    <style:style style:name="P1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2" style:family="paragraph" style:parent-style-name="Table_20_Heading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555555" loext:opacity="100%" style:font-name="HelveticaNeue-Light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HelveticaNeue-Light" fo:font-size="12pt" fo:letter-spacing="normal" fo:font-style="normal" fo:font-weight="normal" style:font-name-asian="HelveticaNeue-Light" style:font-size-asian="12pt" style:font-style-asian="normal" style:font-weight-asian="normal" style:font-name-complex="HelveticaNeue-Light" style:font-size-complex="12pt" style:font-style-complex="normal" style:font-weight-complex="normal" loext:padding="0cm" loext:border="none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Heading_20_2">
      <style:paragraph-properties fo:margin-left="1.501cm" fo:margin-right="0.093cm" fo:margin-top="0cm" fo:margin-bottom="0cm" style:contextual-spacing="false" style:line-height-at-least="0.582cm" fo:text-align="justify" style:justify-single-word="false" fo:text-indent="0cm" style:auto-text-indent="false"/>
      <style:text-properties fo:color="#365f91" loext:opacity="100%" style:font-name="Arial" fo:font-size="14pt" fo:font-weight="bold"/>
    </style:style>
    <style:style style:name="P7" style:family="paragraph" style:parent-style-name="Heading_20_2">
      <style:paragraph-properties fo:margin-left="0cm" fo:margin-right="0cm" fo:margin-top="0.037cm" fo:margin-bottom="0cm" style:contextual-spacing="false" style:line-height-at-least="0.596cm" fo:text-align="justify" style:justify-single-word="false" fo:text-indent="0cm" style:auto-text-indent="false"/>
      <style:text-properties fo:color="#555555" loext:opacity="100%" style:font-name="Arial3" fo:font-size="15pt" fo:font-weight="bold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555555" loext:opacity="100%" style:font-name="HelveticaNeue-Ligh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555555" loext:opacity="100%"/>
    </style:style>
    <style:style style:name="P10" style:family="paragraph" style:parent-style-name="Table_20_Contents">
      <loext:graphic-properties draw:fill="bitmap" style:repeat="repeat" draw:fill-image-ref-point="top-left"/>
      <style:paragraph-properties fo:margin-left="1.058cm" fo:margin-right="0cm" fo:margin-top="0cm" fo:margin-bottom="0cm" style:contextual-spacing="false" style:line-height-at-least="0.529cm" fo:text-indent="0cm" style:auto-text-indent="false" fo:padding-left="0.049cm" fo:padding-right="0cm" fo:padding-top="0cm" fo:padding-bottom="0.049cm" fo:border-left="0.06pt solid #cccccc" fo:border-right="none" fo:border-top="none" fo:border-bottom="0.06pt solid #cccccc">
        <style:background-image/>
      </style:paragraph-properties>
      <style:text-properties fo:color="#0f243e" loext:opacity="100%" fo:letter-spacing="-0.004cm"/>
    </style:style>
    <style:style style:name="P11" style:family="paragraph" style:parent-style-name="Table_20_Contents">
      <loext:graphic-properties draw:fill="bitmap" style:repeat="repeat" draw:fill-image-ref-point="top-left"/>
      <style:paragraph-properties fo:margin-left="1.058cm" fo:margin-right="0cm" fo:margin-top="0cm" fo:margin-bottom="0cm" style:contextual-spacing="false" style:line-height-at-least="0.529cm" fo:text-indent="0cm" style:auto-text-indent="false" fo:padding-left="0.049cm" fo:padding-right="0cm" fo:padding-top="0cm" fo:padding-bottom="0.049cm" fo:border-left="0.06pt solid #cccccc" fo:border-right="none" fo:border-top="none" fo:border-bottom="0.06pt solid #cccccc">
        <style:background-image/>
      </style:paragraph-properties>
      <style:text-properties fo:color="#0f243e" loext:opacity="100%" style:font-name="Courier New" fo:letter-spacing="-0.004cm"/>
    </style:style>
    <style:style style:name="P12" style:family="paragraph" style:parent-style-name="Table_20_Contents" style:list-style-name="L1">
      <style:paragraph-properties fo:margin-left="0cm" fo:margin-right="0cm" fo:text-indent="0cm" style:auto-text-indent="false"/>
      <style:text-properties fo:color="#555555" loext:opacity="100%" style:font-name="HelveticaNeue-Light"/>
    </style:style>
    <style:style style:name="P13" style:family="paragraph" style:parent-style-name="Table_20_Contents" style:list-style-name="L1">
      <style:paragraph-properties fo:margin-left="0cm" fo:margin-right="0cm" fo:margin-top="0.265cm" fo:margin-bottom="0cm" style:contextual-spacing="false" fo:text-indent="0cm" style:auto-text-indent="false"/>
      <style:text-properties fo:color="#555555" loext:opacity="100%" style:font-name="HelveticaNeue-Light"/>
    </style:style>
    <style:style style:name="P14" style:family="paragraph" style:parent-style-name="Table_20_Contents" style:list-style-name="L1">
      <style:paragraph-properties fo:margin-left="0cm" fo:margin-right="0cm" fo:margin-top="0.265cm" fo:margin-bottom="0.499cm" style:contextual-spacing="false" fo:text-indent="0cm" style:auto-text-indent="false"/>
      <style:text-properties fo:color="#555555" loext:opacity="100%" style:font-name="HelveticaNeue-Light"/>
    </style:style>
    <style:style style:name="T1" style:family="text">
      <style:text-properties fo:color="#153152" loext:opacity="100%" style:font-name="HelveticaNeue-Light" fo:font-size="18pt" fo:font-weight="bold"/>
    </style:style>
    <style:style style:name="T2" style:family="text">
      <style:text-properties fo:color="#153152" loext:opacity="100%" style:font-name="HelveticaNeue-Light" fo:font-size="18pt" fo:font-weight="bold" style:font-name-asian="HelveticaNeue-Light" style:font-weight-asian="bold" style:font-name-complex="HelveticaNeue-Light" style:font-weight-complex="bold"/>
    </style:style>
    <style:style style:name="T3" style:family="text">
      <style:text-properties fo:color="#555555" loext:opacity="100%" style:font-name="HelveticaNeue-Light" style:font-name-asian="HelveticaNeue-Light" style:font-name-complex="HelveticaNeue-Light"/>
    </style:style>
    <style:style style:name="T4" style:family="text">
      <style:text-properties style:font-name="Courier New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id24">
        <text:section text:style-name="Sect1" text:name="ta24_1">
          <text:p text:style-name="P1">Introducción de la tarea</text:p>
          <table:table table:name="Tabla1" table:style-name="Tabla1">
            <table:table-column table:style-name="Tabla1.A"/>
            <table:table-row table:style-name="Tabla1.1">
              <table:table-cell table:style-name="Tabla1.A1" office:value-type="string">
                <text:p text:style-name="P2"><text:span text:style-name="Strong_20_Emphasis"><text:span text:style-name="T1">CONTEXTO DE LA TAREA</text:span></text:span><text:span text:style-name="T2"/></text:p>
              </table:table-cell>
            </table:table-row>
            <table:table-row table:style-name="Tabla1.1">
              <table:table-cell table:style-name="Tabla1.A2" office:value-type="string">
                <text:p text:style-name="P3">Con esta tarea aprenderemos a realizar operaciones de consulta de datos sobre documentos XML almacenados en bases de datos XML en eXist, mediante los estándares de consulta XPATH y XQUERY.<text:line-break/><text:line-break/>Para realizar esta tarea es aconsejable revisar los contenidos de la Unidad 6.<text:span text:style-name="T3"/></text:p>
              </table:table-cell>
            </table:table-row>
          </table:table>
          <text:p text:style-name="P4"/>
        </text:section>
      </text:section>
      <text:section text:style-name="Sect1" text:name="id25">
        <text:p text:style-name="P5"/>
        <text:section text:style-name="Sect1" text:name="ta25_1">
          <text:p text:style-name="P1">¿Qué debes hacer?</text:p>
          <table:table table:name="Tabla2" table:style-name="Tabla2">
            <table:table-column table:style-name="Tabla2.A"/>
            <table:table-row table:style-name="Tabla2.1">
              <table:table-cell table:style-name="Tabla2.A1" office:value-type="string">
                <text:p text:style-name="P2"><text:span text:style-name="Strong_20_Emphasis"><text:span text:style-name="T1">ENUNCIADO DE LA TAREA</text:span></text:span><text:span text:style-name="T2"/></text:p>
              </table:table-cell>
            </table:table-row>
            <table:table-row table:style-name="Tabla2.1">
              <table:table-cell table:style-name="Tabla2.A2" office:value-type="string">
                <text:h text:style-name="P6" text:outline-level="2">Realizar las acciones que se indican a continuación.</text:h>
                <text:p text:style-name="P3">Los pasos realizados, y los resultados obtenidos deben de acompañarse a través de las capturas que el alumno considero oportunas a la entrega del informe.</text:p>
                <text:h text:style-name="P7" text:outline-level="2">RA06_g) Se han instalado y analizado sistemas gestores de bases de datos nativas XML.</text:h>
                <text:p text:style-name="P8">Realizar el proceso de instalación de la base de datos nativa XML eXist, realizando las capturas pertinentes para documentar todo este proceso en el informe a entregar con la tarea.</text:p>
                <text:h text:style-name="P7" text:outline-level="2">RA06_f) Se han identificado las características de los sistemas gestores de bases de datos nativas XML.</text:h>
                <text:p text:style-name="P8">Una vez instalado eXist, arrancar el servicio y acceder a la aplicación. (realizar capturas del proceso). Observar que si el puerto que usa eXiste está en uso, este servicio no arrancará.</text:p>
                <text:h text:style-name="P7" text:outline-level="2">RA06_c) Se han establecido tecnologías eficientes de almacenamiento de información en función de sus características.</text:h>
                <text:p text:style-name="P8">Tomando como punto de partido el siguiente documento XML:</text:p>
                <text:p text:style-name="P9"> </text:p>
                <text:p text:style-name="P10"> </text:p>
                <text:p text:style-name="P11">&lt;?xml version="1.0" encoding="UTF-8"?&gt;</text:p>
                <text:p text:style-name="P10">    <text:span text:style-name="T4">&lt;personal_havok_summers&gt;</text:span></text:p>
                <text:p text:style-name="P10">        <text:span text:style-name="T4">&lt;empleado idEmpresa="1AAAB09"&gt;</text:span></text:p>
                <text:p text:style-name="P10">            <text:span text:style-name="T4">&lt;categoria&gt;Programador Junior&lt;/categoria&gt;</text:span></text:p>
                <text:p text:style-name="P10">            <text:span text:style-name="T4">&lt;salario&gt;12.000&lt;/salario&gt;</text:span></text:p>
                <text:p text:style-name="P10">            <text:span text:style-name="T4">&lt;permanencia tiempo="dias"&gt;1000&lt;/permanencia&gt;</text:span></text:p>
                <text:p text:style-name="P10">        <text:span text:style-name="T4">&lt;/empleado&gt;</text:span></text:p>
                <text:p text:style-name="P10">        <text:span text:style-name="T4">&lt;empleado idEmpresa="3AXF01"&gt;</text:span></text:p>
                <text:p text:style-name="P10">            <text:span text:style-name="T4">&lt;categoria&gt;Programador Junior&lt;/categoria&gt;</text:span></text:p>
                <text:p text:style-name="P10">            <text:span text:style-name="T4">&lt;salario&gt;14.500&lt;/salario&gt;</text:span></text:p>
                <text:p text:style-name="P10">            <text:span text:style-name="T4">&lt;permanencia tiempo="años"&gt;2&lt;/permanencia&gt;</text:span></text:p>
                <text:p text:style-name="P10">        <text:span text:style-name="T4">&lt;/empleado&gt;</text:span></text:p>
                <text:p text:style-name="P10">        <text:span text:style-name="T4">&lt;empleado idEmpresa="9XX756A"&gt;</text:span></text:p>
                <text:p text:style-name="P10">            <text:span text:style-name="T4">&lt;categoria&gt;Programador Senior&lt;/categoria&gt;</text:span></text:p>
                <text:p text:style-name="P10">            <text:span text:style-name="T4">&lt;salario&gt;17.000&lt;/salario&gt;</text:span></text:p>
                <text:p text:style-name="P10">            <text:span text:style-name="T4">&lt;permanencia tiempo="meses"&gt;8&lt;/permanencia&gt;</text:span></text:p>
                <text:p text:style-name="P10"><text:soft-page-break/>        <text:span text:style-name="T4">&lt;/empleado&gt;</text:span></text:p>
                <text:p text:style-name="P10">        <text:span text:style-name="T4">&lt;empleado idEmpresa="9$DD90"&gt;</text:span></text:p>
                <text:p text:style-name="P10">            <text:span text:style-name="T4">&lt;categoria&gt;Programador Senior&lt;/categoria&gt;</text:span></text:p>
                <text:p text:style-name="P10">            <text:span text:style-name="T4">&lt;salario&gt;16.500&lt;/salario&gt;</text:span></text:p>
                <text:p text:style-name="P10">            <text:span text:style-name="T4">&lt;permanencia tiempo="dias"&gt;300&lt;/permanencia&gt;</text:span></text:p>
                <text:p text:style-name="P10">        <text:span text:style-name="T4">&lt;/empleado&gt;</text:span></text:p>
                <text:p text:style-name="P10">        <text:span text:style-name="T4">&lt;empleado idEmpresa="AZ0091"&gt;</text:span></text:p>
                <text:p text:style-name="P10">            <text:span text:style-name="T4">&lt;categoria&gt;Jefe de Proyecto&lt;/categoria&gt;</text:span></text:p>
                <text:p text:style-name="P10">            <text:span text:style-name="T4">&lt;salario&gt;25.000&lt;/salario&gt;</text:span></text:p>
                <text:p text:style-name="P10">            <text:span text:style-name="T4">&lt;permanencia tiempo="años"&gt;7&lt;/permanencia&gt;</text:span></text:p>
                <text:p text:style-name="P10">        <text:span text:style-name="T4">&lt;/empleado&gt;</text:span></text:p>
                <text:p text:style-name="P10">        <text:span text:style-name="T4">&lt;empleado idEmpresa="1"&gt;</text:span></text:p>
                <text:p text:style-name="P10">            <text:span text:style-name="T4">&lt;categoria&gt;Gerente&lt;/categoria&gt;</text:span></text:p>
                <text:p text:style-name="P10">            <text:span text:style-name="T4">&lt;salario&gt;50.000&lt;/salario&gt;</text:span></text:p>
                <text:p text:style-name="P10">            <text:span text:style-name="T4">&lt;permanencia tiempo="años"&gt;12&lt;/permanencia&gt;</text:span></text:p>
                <text:p text:style-name="P10">        <text:span text:style-name="T4">&lt;/empleado&gt;</text:span></text:p>
                <text:p text:style-name="P10">        <text:span text:style-name="T4">&lt;empleado idEmpresa="AS155AA1"&gt;</text:span></text:p>
                <text:p text:style-name="P10">            <text:span text:style-name="T4">&lt;categoria&gt;Analista de Desarrollo&lt;/categoria&gt;</text:span></text:p>
                <text:p text:style-name="P10">            <text:span text:style-name="T4">&lt;salario&gt;21.300&lt;/salario&gt;</text:span></text:p>
                <text:p text:style-name="P10">            <text:span text:style-name="T4">&lt;permanencia tiempo="años"&gt;3&lt;/permanencia&gt;</text:span></text:p>
                <text:p text:style-name="P10">        <text:span text:style-name="T4">&lt;/empleado&gt;</text:span></text:p>
                <text:p text:style-name="P10">        <text:span text:style-name="T4">&lt;empleado idEmpresa="APQ131SL1"&gt;</text:span></text:p>
                <text:p text:style-name="P10">            <text:span text:style-name="T4">&lt;categoria&gt;Analista de Desarrollo&lt;/categoria&gt;</text:span></text:p>
                <text:p text:style-name="P10">            <text:span text:style-name="T4">&lt;salario&gt;23.250&lt;/salario&gt;</text:span></text:p>
                <text:p text:style-name="P10">            <text:span text:style-name="T4">&lt;permanencia tiempo="años"&gt;2&lt;/permanencia&gt;</text:span></text:p>
                <text:p text:style-name="P10">        <text:span text:style-name="T4">&lt;/empleado&gt;</text:span></text:p>
                <text:p text:style-name="P10">        <text:span text:style-name="T4">&lt;empleado idEmpresa="XA8923FH"&gt;</text:span></text:p>
                <text:p text:style-name="P10">            <text:span text:style-name="T4">&lt;categoria&gt;Diseñador Web&lt;/categoria&gt;</text:span></text:p>
                <text:p text:style-name="P10">            <text:span text:style-name="T4">&lt;salario&gt;17.755&lt;/salario&gt;</text:span></text:p>
                <text:p text:style-name="P10">            <text:span text:style-name="T4">&lt;permanencia tiempo="meses"&gt;9&lt;/permanencia&gt;</text:span></text:p>
                <text:p text:style-name="P10">        <text:span text:style-name="T4">&lt;/empleado&gt;</text:span></text:p>
                <text:p text:style-name="P10">    <text:span text:style-name="T4">&lt;/personal_havok_summers&gt;</text:span></text:p>
                <text:p text:style-name="P10"> </text:p>
                <text:p text:style-name="P9"> </text:p>
                <text:h text:style-name="P7" text:outline-level="2">RA06_d) Se han utilizado sistemas gestores de bases de datos relacionales en el almacenamiento de información en formato XML.</text:h>
                <text:p text:style-name="P8">Crear una colección (equivalente a una BD en SGBD relaciones) y subir un documento XML (equivalente a una tabla en SGBD relacionales) con los datos de los empleados anteriormente especificados.</text:p>
                <text:h text:style-name="P7" text:outline-level="2">RA06_h) Se han utilizado técnicas para gestionar la información almacenada en bases de datos nativas XML</text:h>
                <text:list text:style-name="L1">
                  <text:list-item>
                    <text:p text:style-name="P12">Una vez creado el documento, se deben realizar las siguientes consultas XQUERY:</text:p>
                    <text:list>
                      <text:list-item>
                        <text:p text:style-name="P13">Obtener la información de los miembros del personal cuya permanencia se cuente en dias.</text:p>
                      </text:list-item>
                      <text:list-item>
                        <text:p text:style-name="P13">Obtener la información de los miembros del personal cuya permanencia se <text:soft-page-break/>cuente en meses.</text:p>
                      </text:list-item>
                      <text:list-item>
                        <text:p text:style-name="P13">Obtener la información de los miembros del personal cuyo salario sea mayor de 10000.</text:p>
                      </text:list-item>
                      <text:list-item>
                        <text:p text:style-name="P13">Obtener la información de los miembros del personal cuyo salario sea mayor de 10000 y su categoría distinta de "Analista de Desarrollo".</text:p>
                      </text:list-item>
                      <text:list-item>
                        <text:p text:style-name="P14">Obtener la información de los miembros del personal cuya categoría sea distinta de "Diseñador" o "Programador"</text:p>
                      </text:list-item>
                    </text:list>
                  </text:list-item>
                </text:list>
                <text:h text:style-name="P7" text:outline-level="2">RA06_i) Se han identificado lenguajes y herramientas para el tratamiento y almacenamiento de información y su inclusión en documentos XML.</text:h>
                <text:p text:style-name="P8">Todas las consultas deben ir realizar en lenguaje XQuery<text:span text:style-name="T3"/></text:p>
              </table:table-cell>
            </table:table-row>
          </table:table>
          <text:p text:style-name="P4"/>
        </text:section>
      </text:section>
      <text:section text:style-name="Sect1" text:name="id26">
        <text:p text:style-name="P5"/>
        <text:section text:style-name="Sect1" text:name="ta26_1">
          <text:p text:style-name="P1">¿Qué debes tener en cuenta para resolver la tarea?</text:p>
          <table:table table:name="Tabla3" table:style-name="Tabla3">
            <table:table-column table:style-name="Tabla3.A"/>
            <table:table-row table:style-name="Tabla3.1">
              <table:table-cell table:style-name="Tabla3.A1" office:value-type="string">
                <text:p text:style-name="P2"><text:span text:style-name="Strong_20_Emphasis"><text:span text:style-name="T1">CONSEJOS Y RECOMENDACIONES PARA REALIZAR LA TAREA.</text:span></text:span><text:span text:style-name="T2"/></text:p>
              </table:table-cell>
            </table:table-row>
            <table:table-row table:style-name="Tabla3.1">
              <table:table-cell table:style-name="Tabla3.A2" office:value-type="string">
                <text:p text:style-name="P3">Para realizar esta tarea es aconsejable revisar los contenidos de la Unidad 7.</text:p>
                <text:p text:style-name="P3">Seguir los siguientes consejos:</text:p>
                <text:p text:style-name="P3">1 - Realizar la instalación de eXist, Asegurarse de que exist funciona correctamente.</text:p>
                <text:p text:style-name="P3">2 - Arrancar el servicio</text:p>
                <text:p text:style-name="P3">3 - Crear una colección para insertar el XML posteriormente.</text:p>
                <text:p text:style-name="P3">4 - Crear el XML con los datos que aparecen mas arriba y comprobar que está bien formado.</text:p>
                <text:p text:style-name="P3">5 - Agregar el XML  a la colección de eXist</text:p>
                <text:p text:style-name="P3">6 - Crear cada sentencia e ir probándola. En el informe resultante es necesario realizar capturas tanto de la sentencia escrita como de los resultados.</text:p>
                <text:p text:style-name="P3">7- No olvidar usar sentencias Xquery NO XPATH.<text:span text:style-name="T3"/></text:p>
              </table:table-cell>
            </table:table-row>
          </table:table>
          <text:p text:style-name="P4"/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, sans-serif"/>
    <style:font-face style:name="Courier New" svg:font-family="'Courier New'"/>
    <style:font-face style:name="HelveticaNeue-Light" svg:font-family="HelveticaNeue-Light, 'Helvetica Neue Light', 'Helvetica Neue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5T10:43:08.003957100</meta:creation-date>
    <dc:date>2026-06-15T10:43:27.302540900</dc:date>
    <meta:editing-duration>PT19S</meta:editing-duration>
    <meta:editing-cycles>1</meta:editing-cycles>
    <meta:document-statistic meta:table-count="3" meta:image-count="0" meta:object-count="0" meta:page-count="3" meta:paragraph-count="87" meta:word-count="599" meta:character-count="5100" meta:non-whitespace-character-count="4108"/>
    <meta:generator>LibreOffice/26.2.3.2$Windows_X86_64 LibreOffice_project/70e089b17412e4cb7773e41413306b17a2328c34</meta:generator>
  </office:meta>
</office:document-meta>
</file>