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2" style:family="table-row">
      <style:table-row-properties fo:background-color="#c3dcf7">
        <style:background-image/>
      </style:table-row-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Table_20_Contents">
      <style:paragraph-properties fo:margin-top="0cm" fo:margin-bottom="0.499cm" style:contextual-spacing="false"/>
    </style:style>
    <style:style style:name="P8" style:family="paragraph" style:parent-style-name="Table_20_Contents">
      <style:paragraph-properties fo:margin-left="1.501cm" fo:margin-right="0.093cm" fo:margin-top="0cm" fo:margin-bottom="0cm" style:contextual-spacing="false" style:line-height-at-least="0.582cm" fo:text-align="justify" style:justify-single-word="false" fo:text-indent="0cm" style:auto-text-indent="false"/>
    </style:style>
    <style:style style:name="P9" style:family="paragraph" style:parent-style-name="Table_20_Contents">
      <style:paragraph-properties fo:margin-left="0cm" fo:margin-right="0cm" fo:margin-top="0cm" fo:margin-bottom="0.499cm" style:contextual-spacing="false" fo:text-indent="0cm" style:auto-text-indent="false"/>
      <style:text-properties style:font-name="Arial3" fo:font-size="15pt" fo:font-weight="bold"/>
    </style:style>
    <style:style style:name="P10" style:family="paragraph" style:parent-style-name="Heading_20_2" style:list-style-name="L1">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3" fo:font-size="15pt" fo:font-weight="bold"/>
    </style:style>
    <style:style style:name="P11" style:family="paragraph" style:parent-style-name="Table_20_Contents">
      <style:paragraph-properties fo:margin-left="0cm" fo:margin-right="0cm" fo:margin-top="0cm" fo:margin-bottom="0cm" style:contextual-spacing="false" fo:text-align="justify" style:justify-single-word="false" fo:text-indent="0cm" style:auto-text-indent="false"/>
      <style:text-properties fo:color="#555555" loext:opacity="100%" style:font-name="HelveticaNeue-Light"/>
    </style:style>
    <style:style style:name="P12" style:family="paragraph" style:parent-style-name="Heading_20_2" style:list-style-name="L2">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3" fo:font-size="15pt" fo:font-weight="bold"/>
    </style:style>
    <style:style style:name="P13" style:family="paragraph" style:parent-style-name="Table_20_Contents" style:list-style-name="L3">
      <style:paragraph-properties fo:margin-left="0cm" fo:margin-right="0cm" fo:text-indent="0cm" style:auto-text-indent="false"/>
      <style:text-properties fo:color="#555555" loext:opacity="100%" style:font-name="HelveticaNeue-Light"/>
    </style:style>
    <style:style style:name="P14" style:family="paragraph" style:parent-style-name="Table_20_Contents" style:list-style-name="L3">
      <style:paragraph-properties fo:margin-left="0cm" fo:margin-right="0cm" fo:margin-top="0cm" fo:margin-bottom="0.499cm" style:contextual-spacing="false" fo:text-indent="0cm" style:auto-text-indent="false"/>
      <style:text-properties fo:color="#555555" loext:opacity="100%" style:font-name="HelveticaNeue-Light"/>
    </style:style>
    <style:style style:name="P15" style:family="paragraph" style:parent-style-name="Heading_20_2" style:list-style-name="L4">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3" fo:font-size="15pt" fo:font-weight="bold"/>
    </style:style>
    <style:style style:name="P16" style:family="paragraph" style:parent-style-name="Table_20_Contents">
      <style:paragraph-properties fo:margin-left="0cm" fo:margin-right="0cm" fo:margin-top="0cm" fo:margin-bottom="0cm" style:contextual-spacing="false" fo:text-indent="0cm" style:auto-text-indent="false"/>
      <style:text-properties fo:color="#365f91" loext:opacity="100%" style:font-name="Arial" fo:font-size="12pt" fo:font-weight="bold"/>
    </style:style>
    <style:style style:name="P17" style:family="paragraph" style:parent-style-name="Table_20_Contents">
      <style:paragraph-properties fo:margin-left="0cm" fo:margin-right="0cm" fo:margin-top="0cm" fo:margin-bottom="0cm" style:contextual-spacing="false" fo:text-indent="0cm" style:auto-text-indent="false"/>
    </style:style>
    <style:style style:name="P18"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fo:font-size="12p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365f91" loext:opacity="100%" style:font-name="Arial" fo:font-size="14pt" fo:font-weight="bold"/>
    </style:style>
    <style:style style:name="T5" style:family="text">
      <style:text-properties fo:color="#555555" loext:opacity="100%" style:font-name="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á a crear  un sitio Web y  a vincular todos los ficheros que forman parte de la web.</text:p>
                <text:p text:style-name="P4"> </text:p>
                <text:p text:style-name="P3">Para el desarrollo de esta tarea es necesario repasar los contenidos de la Unidad 2.<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7"/>
                <text:p text:style-name="Horizontal_20_Line"/>
                <text:p text:style-name="P8"><text:span text:style-name="Strong_20_Emphasis"><text:span text:style-name="T4">RA03_d) Se ha identificado la estructura y la sintaxis de un canal de contenidos.</text:span></text:span></text:p>
                <text:p text:style-name="Horizontal_20_Line"/>
                <text:p text:style-name="P9"/>
                <text:p text:style-name="P3">Vamos a construir un fichero .RSS que nombraremos con nuestro nombre y apellidos. Ej.: juan_iruela_lara.RSS</text:p>
                <text:p text:style-name="P3">Ese fichero debe tener la estructura básica de un RSS bien formado indicando que trabajaremos con la versión 2.0 de RSS y la codificación va a ser UTF8.</text:p>
                <text:p text:style-name="Horizontal_20_Line"/>
                <text:p text:style-name="P8"><text:span text:style-name="Strong_20_Emphasis"><text:span text:style-name="T4">RA03_e) Se han creado y validado canales de contenidos. </text:span></text:span></text:p>
                <text:p text:style-name="Horizontal_20_Line"/>
                <text:list text:style-name="L1">
                  <text:list-item>
                    <text:list>
                      <text:list-item>
                        <text:h text:style-name="P10" text:outline-level="2">Creación de un fichero RSS</text:h>
                      </text:list-item>
                    </text:list>
                  </text:list-item>
                </text:list>
                <text:p text:style-name="P11">Con un editor XML, crear la estructura principal de nuestro fichero RSS. La estructura debe incluir los datos referentes al canal de distribución de noticias, como son el título, la descripción y un enlace.</text:p>
                <text:p text:style-name="Horizontal_20_Line"/>
                <text:list text:style-name="L2">
                  <text:list-item>
                    <text:list>
                      <text:list-item>
                        <text:h text:style-name="P12" text:outline-level="2">Agregar noticias</text:h>
                      </text:list-item>
                    </text:list>
                  </text:list-item>
                </text:list>
                <text:p text:style-name="P3">Se deben agregar al menos 2 noticias al fichero RSS. Cada noticia debe tener:</text:p>
                <text:list text:style-name="L3">
                  <text:list-item>
                    <text:p text:style-name="P13">un título</text:p>
                  </text:list-item>
                  <text:list-item>
                    <text:p text:style-name="P13">una descripción</text:p>
                  </text:list-item>
                  <text:list-item>
                    <text:p text:style-name="P13">un enlace</text:p>
                  </text:list-item>
                  <text:list-item>
                    <text:p text:style-name="P13">una fecha de publicación</text:p>
                  </text:list-item>
                  <text:list-item>
                    <text:p text:style-name="P14">una imagen</text:p>
                  </text:list-item>
                </text:list>
                <text:p text:style-name="Horizontal_20_Line"/>
                <text:p text:style-name="P8"><text:span text:style-name="Strong_20_Emphasis"><text:span text:style-name="T4">RA03_f) Se ha comprobado la funcionalidad y el acceso a los canales.</text:span></text:span></text:p>
                <text:p text:style-name="Horizontal_20_Line"/>
                <text:list text:style-name="L4">
                  <text:list-item>
                    <text:list>
                      <text:list-item>
                        <text:h text:style-name="P15" text:outline-level="2">Validar que el RSS está bien formado</text:h>
                      </text:list-item>
                    </text:list>
                  </text:list-item>
                </text:list>
                <text:p text:style-name="P3"><text:soft-page-break/>Hacer una captura con los resultados de la validación, incorporando estas capturas al informe de la entrega.</text:p>
                <text:p text:style-name="P3">Debemos de validar tanto que el RSS está bien formado (como XML) como que es válido..</text:p>
                <text:p text:style-name="P3">Es normal que el validador muestre errores si los enlaces o imágenes tienen URLs ficticias, no pasa nada.</text:p>
                <text:p text:style-name="P16">Nota: Todos los enlaces, imágenes pueden ser ficticios. Solo se va a valorar que la estructura y etiquetas del RSS sean correctas.<text:span text:style-name="T3"/></text:p>
              </table:table-cell>
            </table:table-row>
          </table:table>
          <text:p text:style-name="P5"/>
        </text:section>
      </text:section>
      <text:section text:style-name="Sect1" text:name="id26">
        <text:p text:style-name="P6"/>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2">
              <table:table-cell table:style-name="Tabla3.A2" office:value-type="string">
                <text:p text:style-name="P3">Para realizar esta tarea es aconsejable revisar los contenidos de la Unidad 3.</text:p>
                <text:p text:style-name="P4"> </text:p>
                <text:p text:style-name="P3">Los pasos aconsejados a seguir para realizar esta tarea son:</text:p>
                <text:p text:style-name="P3">1. Crear un fichero RSS desde el editor XML Copy Editor </text:p>
                <text:p text:style-name="P3">2. A  partir de esa estructura básica ir añadiendo los elementos que se piden en la tarea.</text:p>
                <text:p text:style-name="P3">3. Los enlaces pueden ser ficticios</text:p>
                <text:p text:style-name="P3">4. Las URLs de las imágenes pueden ser inventados tambien.</text:p>
                <text:p text:style-name="P3">5. Comprobar que el XML está bien formado.</text:p>
                <text:p text:style-name="P17"><text:span text:style-name="T5">6. Comprobar a través de la web de W3C en su apartado de </text:span><text:span text:style-name="Emphasis"><text:span text:style-name="T5">Feed Validation Service</text:span></text:span><text:span text:style-name="T5"> o cualquiera otro validador, que el RSS creado es válido.</text:span></text:p>
                <text:p text:style-name="P18">.<text:span text:style-name="T3"/></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39:16.353885400</meta:creation-date>
    <dc:date>2026-06-15T10:39:52.991992000</dc:date>
    <meta:editing-duration>PT36S</meta:editing-duration>
    <meta:editing-cycles>1</meta:editing-cycles>
    <meta:document-statistic meta:table-count="3" meta:image-count="0" meta:object-count="0" meta:page-count="2" meta:paragraph-count="38" meta:word-count="402" meta:character-count="2261" meta:non-whitespace-character-count="1896"/>
    <meta:generator>LibreOffice/26.2.3.2$Windows_X86_64 LibreOffice_project/70e089b17412e4cb7773e41413306b17a2328c34</meta:generator>
  </office:meta>
</office:document-meta>
</file>