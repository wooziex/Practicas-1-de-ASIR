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-left="1.588cm" fo:padding-right="0.049cm" fo:padding-top="0.049cm" fo:padding-bottom="0.049cm" fo:border="0.5pt solid #d4e0ee"/>
    </style:style>
    <style:style style:name="Tabla2.A3" style:family="table-cell">
      <style:table-cell-properties style:vertical-align="middle" fo:padding-left="1.588cm" fo:padding-right="0.049cm" fo:padding-top="0.049cm" fo:padding-bottom="0.049cm" fo:border="0.5pt solid #d4e0e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1" style:family="table-row">
      <style:table-row-properties fo:background-color="#fcfdfe">
        <style:background-image/>
      </style:table-row-properties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3.2" style:family="table-row">
      <style:table-row-properties fo:background-color="#c3dcf7">
        <style:background-image/>
      </style:table-row-properties>
    </style:style>
    <style:style style:name="Tabla3.A2" style:family="table-cell">
      <style:table-cell-properties style:vertical-align="middle" fo:padding="0.049cm" fo:border="0.5pt solid #d4e0e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HelveticaNeue-Light" fo:font-size="12pt" fo:font-weight="normal"/>
    </style:style>
    <style:style style:name="P8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HelveticaNeue-Light" fo:font-size="18pt" fo:font-weight="bold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HelveticaNeue-Light" fo:font-size="12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Heading_20_2">
      <style:paragraph-properties fo:margin-left="0cm" fo:margin-right="0cm" fo:margin-top="0.037cm" fo:margin-bottom="0cm" style:contextual-spacing="false" style:line-height-at-least="0.596cm" fo:text-align="justify" style:justify-single-word="false" fo:text-indent="0cm" style:auto-text-indent="false"/>
      <style:text-properties fo:color="#555555" loext:opacity="100%" style:font-name="Arial2" fo:font-size="15pt" fo:font-weight="bold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 fo:font-weight="bold"/>
    </style:style>
    <style:style style:name="P13" style:family="paragraph" style:parent-style-name="Table_20_Contents" style:list-style-name="L1">
      <style:paragraph-properties fo:margin-left="0cm" fo:margin-right="0cm" fo:margin-top="0.265cm" fo:margin-bottom="0cm" style:contextual-spacing="false" fo:text-indent="0cm" style:auto-text-indent="false"/>
      <style:text-properties fo:color="#555555" loext:opacity="100%" style:font-name="HelveticaNeue-Light"/>
    </style:style>
    <style:style style:name="P14" style:family="paragraph" style:parent-style-name="Table_20_Contents" style:list-style-name="L1">
      <style:paragraph-properties fo:margin-left="0cm" fo:margin-right="0cm" fo:margin-top="0.265cm" fo:margin-bottom="0.499cm" style:contextual-spacing="false" fo:text-indent="0cm" style:auto-text-indent="false"/>
      <style:text-properties fo:color="#555555" loext:opacity="100%" style:font-name="HelveticaNeue-Light"/>
    </style:style>
    <style:style style:name="P1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/>
    </style:style>
    <style:style style:name="P16" style:family="paragraph" style:parent-style-name="Table_20_Contents" style:list-style-name="L2">
      <style:paragraph-properties fo:margin-left="0cm" fo:margin-right="0cm" fo:margin-top="0.265cm" fo:margin-bottom="0cm" style:contextual-spacing="false" fo:text-indent="0cm" style:auto-text-indent="false"/>
      <style:text-properties fo:color="#555555" loext:opacity="100%" style:font-name="HelveticaNeue-Light"/>
    </style:style>
    <style:style style:name="P17" style:family="paragraph" style:parent-style-name="Table_20_Contents" style:list-style-name="L2">
      <style:paragraph-properties fo:margin-left="0cm" fo:margin-right="0cm" fo:margin-top="0.265cm" fo:margin-bottom="0.499cm" style:contextual-spacing="false" fo:text-indent="0cm" style:auto-text-indent="false"/>
      <style:text-properties fo:color="#555555" loext:opacity="100%" style:font-name="HelveticaNeue-Light"/>
    </style:style>
    <style:style style:name="P1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2" fo:font-size="15pt" fo:font-weight="bold"/>
    </style:style>
    <style:style style:name="P1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 style:font-name-asian="HelveticaNeue-Light" style:font-name-complex="HelveticaNeue-Light"/>
    </style:style>
    <style:style style:name="P20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153152" loext:opacity="100%" style:font-name="HelveticaNeue-Light" fo:font-weight="bold" style:font-name-asian="HelveticaNeue-Light" style:font-weight-asian="bold" style:font-name-complex="HelveticaNeue-Light" style:font-weight-complex="bold"/>
    </style:style>
    <style:style style:name="T5" style:family="text">
      <style:text-properties style:font-name="Arial2" fo:font-size="15pt" fo:font-weight="bold"/>
    </style:style>
    <style:style style:name="T6" style:family="text">
      <style:text-properties fo:color="#555555" loext:opacity="100%" style:font-name="HelveticaNeue-Light"/>
    </style:style>
    <style:style style:name="T7" style:family="text">
      <style:text-properties style:font-name="HelveticaNeue-Light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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Con esta tarea aprenderá a crear un fichero XML bien formado para utilizarlo en un intercambio de datos.</text:p>
                <text:p text:style-name="P4"> </text:p>
                <text:p text:style-name="P3">Para el desarrollo de esta tarea es necesario repasar los contenidos de la unidad 1<text:span text:style-name="T3"/></text:p>
              </table:table-cell>
            </table:table-row>
          </table:table>
          <text:p text:style-name="P5"/>
        </text:section>
      </text:section>
      <text:section text:style-name="Sect1" text:name="id25">
        <text:p text:style-name="P6"/>
        <text:section text:style-name="Sect1" text:name="ta25_1">
          <text:p text:style-name="P7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8">ENUNCIADO DE LA TAREA<text:span text:style-name="T4"/></text:p>
              </table:table-cell>
            </table:table-row>
            <table:table-row table:style-name="Tabla2.1">
              <table:table-cell table:style-name="Tabla2.A2" office:value-type="string">
                <text:p text:style-name="P9">Esta tarea consiste en implementar correctamente los siguientes apartados:</text:p>
                <text:p text:style-name="P10"/>
                <text:h text:style-name="P11" text:outline-level="2">RA01_e) Se ha reconocido la necesidad y los ámbitos específicos de aplicación de un lenguaje de marcas de propósito general.</text:h>
                <text:p text:style-name="P4"> </text:p>
                <text:p text:style-name="P4">  </text:p>
                <text:p text:style-name="P12">Creación de un fichero .TXT llamado "MisDatos.txt"</text:p>
                <text:p text:style-name="P4"> </text:p>
                <text:p text:style-name="P3">El documento TXT debe almacenar la siguiente información:</text:p>
                <text:list text:style-name="L1"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Nombre</text:p>
                              </text:list-item>
                              <text:list-item>
                                <text:p text:style-name="P13">Apellidos</text:p>
                              </text:list-item>
                              <text:list-item>
                                <text:p text:style-name="P13">DNI</text:p>
                              </text:list-item>
                              <text:list-item>
                                <text:p text:style-name="P14">Eda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(El fichero debe contener al menos los datos de dos personas: los datos de la primera persona deben corresponderse con los datos reales del alumno que realiza la tarea).</text:p>
                <text:p text:style-name="P15"> <text:span text:style-name="T5"/></text:p>
                <text:p text:style-name="P4"> </text:p>
                <text:p text:style-name="P12">Creación de un fichero XML llamado "MisDatos.xml"</text:p>
                <text:p text:style-name="P4"> </text:p>
                <text:p text:style-name="P3">Con los mismo datos usados en el TXT, crear ahora un fichero  XML que también almacene la siguiente información:</text:p>
                <text:list text:style-name="L2">
                  <text:list-item>
                    <text:list>
                      <text:list-item>
                        <text:p text:style-name="P16">Nombre</text:p>
                      </text:list-item>
                      <text:list-item>
                        <text:p text:style-name="P16">Apellidos</text:p>
                      </text:list-item>
                      <text:list-item>
                        <text:p text:style-name="P16">DNI</text:p>
                      </text:list-item>
                      <text:list-item>
                        <text:p text:style-name="P17">Edad</text:p>
                      </text:list-item>
                    </text:list>
                  </text:list-item>
                </text:list>
                <text:p text:style-name="P3">( El fichero debe contener al menos los datos de dos personas y el primer elemento de ese XML debe corresponderse con los datos reales del alumno que realiza la tarea).</text:p>
                <text:p text:style-name="P4"> </text:p>
                <text:p text:style-name="P12"><text:soft-page-break/>Validar el archivo XML del apartado RA01_e, desde la página oficial de w3c o desde las opciones propias del editor XML Copy Editor u otro que permita analizar XML bien formados.</text:p>
                <text:p text:style-name="P3">Hacer una captura de los resultados y adjuntarla en el fichero de soluciones.</text:p>
                <text:p text:style-name="P4"> </text:p>
                <text:p text:style-name="P4">  </text:p>
                <text:h text:style-name="P11" text:outline-level="2">RA01_b) Se han reconocido las ventajas que proporcionan en el tratamiento de la información.</text:h>
                <text:p text:style-name="P4"> </text:p>
                <text:p text:style-name="P3">Detallar en el informe qué ventajas crees que tenemos al almacenar la información en XML frente al almacenamiento en TXT.</text:p>
                <text:p text:style-name="P4"> </text:p>
                <text:p text:style-name="P15"> <text:span text:style-name="T5"/></text:p>
                <text:h text:style-name="P11" text:outline-level="2">RA01_g) Se han identificado la estructura de un documento y sus reglas sintácticas.</text:h>
                <text:p text:style-name="P4"> </text:p>
                <text:p text:style-name="P18"/>
                <text:p text:style-name="P12">Indica si cada uno de los siguientes ejemplos de XML cumplen las reglas de un documento XML Válido. En esta subtarea debemos indicar si el apartado correspondiente es correcto o no de acuerdo a los criterios de XML bien formado. </text:p>
                <text:p text:style-name="P4"> </text:p>
                <text:p text:style-name="P10"><text:span text:style-name="Strong_20_Emphasis"><text:span text:style-name="T6">a)</text:span></text:span><text:span text:style-name="T6">  &lt;?xml version="1.0" encoding="UTF-8"?&gt;</text:span></text:p>
                <text:p text:style-name="P3">&lt;cliente&gt;</text:p>
                <text:p text:style-name="P3">&lt;nombre&gt;Pedro&lt;/nombre&gt;</text:p>
                <text:p text:style-name="P3">&lt;DNI&gt;1A45559&lt;/DNI&gt;</text:p>
                <text:p text:style-name="P3">&lt;/cliente&gt;</text:p>
                <text:p text:style-name="P3">&lt;cliente&gt;</text:p>
                <text:p text:style-name="P3">&lt;nombre&gt;María&lt;/nombre&gt;</text:p>
                <text:p text:style-name="P3">&lt;/cliente&gt;</text:p>
                <text:p text:style-name="P4"> </text:p>
                <text:p text:style-name="P10"><text:span text:style-name="Strong_20_Emphasis"><text:span text:style-name="T6">b)</text:span></text:span><text:span text:style-name="T6"> &lt;?xml version="1.0" encoding="ISO-8859-1"?&gt;</text:span></text:p>
                <text:p text:style-name="P3">&lt;texto&gt; Esto es un</text:p>
                <text:p text:style-name="P3">&lt;negrita&gt;&lt;cursiva&gt;texto&lt;/negrita&gt; con más&lt;/cursiva&gt; formato.</text:p>
                <text:p text:style-name="P3">&lt;/texto&gt;</text:p>
                <text:p text:style-name="P4"> </text:p>
                <text:p text:style-name="P10"><text:span text:style-name="Strong_20_Emphasis"><text:span text:style-name="T6">c)</text:span></text:span><text:span text:style-name="T6"> &lt;coche&gt;</text:span></text:p>
                <text:p text:style-name="P3">&lt;marca&gt;Peugeot&lt;/marca&gt;</text:p>
                <text:p text:style-name="P3">&lt;modelo&gt;205&lt;/modelo&gt;</text:p>
                <text:p text:style-name="P3">&lt;/coche&gt;</text:p>
                <text:p text:style-name="P4"> </text:p>
                <text:p text:style-name="P10"><text:span text:style-name="Strong_20_Emphasis"><text:span text:style-name="T6">d)</text:span></text:span><text:span text:style-name="T6"> &lt;?xml version="1.0" encoding="UTF-8"?&gt;</text:span></text:p>
                <text:p text:style-name="P3">&lt;amigos&gt;</text:p>
                <text:p text:style-name="P3">&lt;amigo telefono=999999999 telefono=666666666&gt;Laura Pastel&lt;/amigo&gt;</text:p>
                <text:p text:style-name="P3">&lt;amigo telefono=933333333&gt;Federico&lt;/amigo&gt;</text:p>
                <text:p text:style-name="P3">&lt;/amigos&gt;</text:p>
                <text:p text:style-name="P4"> </text:p>
                <text:p text:style-name="P10"><text:span text:style-name="Strong_20_Emphasis"><text:span text:style-name="T6">e)</text:span></text:span><text:span text:style-name="T6"> &lt;?xml version="1.0" encoding="UTF-8"?&gt;</text:span></text:p>
                <text:p text:style-name="P3">&lt;ejercicio&gt; Encuentra la solución de la inecuación: <text:soft-page-break/>&lt;inecuacion&gt;2*x&lt;37&lt;inecuacion&gt; &lt;/ejercicio&gt;</text:p>
                <text:p text:style-name="Horizontal_20_Line"/>
                <text:p text:style-name="P4"> <text:span text:style-name="T7">Para los casos que no cumplan las normas de un documento XML indicar que esta mal y plantear una solución para resolver el problema.</text:span></text:p>
                <text:p text:style-name="P3">Si existe más de un problema en un apartado hay que hacer referencia a cada uno y aportar la solución a cada uno para dar por correcta la solución.</text:p>
                <text:p text:style-name="P4"> </text:p>
                <text:p text:style-name="P3">Los apartados que estén correctos simplemente indicarlo con la palabra CORRECTO.</text:p>
                <text:p text:style-name="P19"/>
              </table:table-cell>
            </table:table-row>
            <table:table-row table:style-name="Tabla2.1">
              <table:table-cell table:style-name="Tabla2.A3" office:value-type="string">
                <text:p text:style-name="P20"/>
              </table:table-cell>
            </table:table-row>
          </table:table>
          <text:p text:style-name="P5"/>
        </text:section>
      </text:section>
      <text:section text:style-name="Sect1" text:name="id26">
        <text:p text:style-name="P6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able:table-row table:style-name="Tabla3.1">
              <table:table-cell table:style-name="Tabla3.A1" office:value-type="string">
                <text:p text:style-name="P2"><text:span text:style-name="Strong_20_Emphasis"><text:span text:style-name="T1">CONSEJOS Y RECOMENDACIONES PARA REALIZAR LA TAREA.</text:span></text:span><text:span text:style-name="T2"/></text:p>
              </table:table-cell>
            </table:table-row>
            <table:table-row table:style-name="Tabla3.2">
              <table:table-cell table:style-name="Tabla3.A2" office:value-type="string">
                <text:p text:style-name="P3">Para realizar esta tarea es aconsejable realizar los siguientes pasos:</text:p>
                <text:p text:style-name="P3">1. Descargar el editor XML Copy Editor o cualquier otro que permita trabajar con XML.</text:p>
                <text:p text:style-name="P3">2. En la subtarea RA01_g debe indicar si el apartado es correcto o no y si no lo es, la solución correcta para que el código expuesto sea XML bien formado.</text:p>
                <text:p text:style-name="P3">3. Analizar  los ejercicios resueltos, la resolución de estos ejercicios ayudarán a realizar el apartado RA01_e. Ver como se pasan los datos desde el formato TXT a XML.</text:p>
                <text:p text:style-name="P3">4. Buscar la página web oficial de W3C para comprobar que el XML es correcto, o bien las opciones del propio editor XML para comprobar que está bien formado el fichero XML obtenido en el apartado RA01_e.</text:p>
                <text:p text:style-name="P3">5. Todos los pasos realizados y los resultados obtenidos se reflejaran con capturas en el informe que el alumno debe desarrollar.</text:p>
                <text:p text:style-name="P4"> <text:span text:style-name="T3"/></text:p>
              </table:table-cell>
            </table:table-row>
          </table:table>
          <text:p text:style-name="P5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0:34:47.148587600</meta:creation-date>
    <dc:date>2026-06-15T10:35:06.674899300</dc:date>
    <meta:editing-duration>PT19S</meta:editing-duration>
    <meta:editing-cycles>1</meta:editing-cycles>
    <meta:document-statistic meta:table-count="3" meta:image-count="0" meta:object-count="0" meta:page-count="3" meta:paragraph-count="83" meta:word-count="601" meta:character-count="3831" meta:non-whitespace-character-count="3272"/>
    <meta:generator>LibreOffice/26.2.3.2$Windows_X86_64 LibreOffice_project/70e089b17412e4cb7773e41413306b17a2328c34</meta:generator>
  </office:meta>
</office:document-meta>
</file>