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17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17cm" table:align="left"/>
    </style:style>
    <style:style style:name="Tabla2.A" style:family="table-column">
      <style:table-column-properties style:column-width="17cm"/>
    </style:style>
    <style:style style:name="Tabla2.1" style:family="table-row">
      <style:table-row-properties fo:background-color="#fcfdfe">
        <style:background-image/>
      </style:table-row-properties>
    </style:style>
    <style:style style:name="Tabla2.A1" style:family="table-cell">
      <style:table-cell-properties style:vertical-align="middle" fo:background-color="#c3dcf7" fo:padding="0.049cm" fo:border="0.5pt solid #d4e0ee">
        <style:background-image/>
      </style:table-cell-properties>
    </style:style>
    <style:style style:name="Tabla2.A2" style:family="table-cell">
      <style:table-cell-properties style:vertical-align="middle" fo:padding="0.049cm" fo:border="0.5pt solid #d4e0ee"/>
    </style:style>
    <style:style style:name="Tabla3" style:family="table">
      <style:table-properties style:width="15.734cm" table:align="left"/>
    </style:style>
    <style:style style:name="Tabla3.A" style:family="table-column">
      <style:table-column-properties style:column-width="7.5cm"/>
    </style:style>
    <style:style style:name="Tabla3.B" style:family="table-column">
      <style:table-column-properties style:column-width="2.861cm"/>
    </style:style>
    <style:style style:name="Tabla3.C" style:family="table-column">
      <style:table-column-properties style:column-width="1.076cm"/>
    </style:style>
    <style:style style:name="Tabla3.D" style:family="table-column">
      <style:table-column-properties style:column-width="2.441cm"/>
    </style:style>
    <style:style style:name="Tabla3.E" style:family="table-column">
      <style:table-column-properties style:column-width="1.856cm"/>
    </style:style>
    <style:style style:name="Tabla3.1" style:family="table-row">
      <style:table-row-properties fo:background-color="#fcfdfe">
        <style:background-image/>
      </style:table-row-properties>
    </style:style>
    <style:style style:name="Tabla3.A1" style:family="table-cell">
      <style:table-cell-properties style:vertical-align="middle" fo:background-color="#c3dcf7" fo:padding="0.049cm" fo:border="0.5pt solid #d4e0ee">
        <style:background-image/>
      </style:table-cell-properties>
    </style:style>
    <style:style style:name="Tabla3.A2" style:family="table-cell">
      <style:table-cell-properties style:vertical-align="middle" fo:padding="0.049cm" fo:border="0.5pt solid #d4e0ee"/>
    </style:style>
    <style:style style:name="Tabla3.B2" style:family="table-cell">
      <style:table-cell-properties style:vertical-align="middle" fo:padding="0.049cm" fo:border="0.5pt solid #d4e0ee"/>
    </style:style>
    <style:style style:name="Tabla3.C2" style:family="table-cell">
      <style:table-cell-properties style:vertical-align="middle" fo:padding="0.049cm" fo:border="0.5pt solid #d4e0ee"/>
    </style:style>
    <style:style style:name="Tabla3.D2" style:family="table-cell">
      <style:table-cell-properties style:vertical-align="middle" fo:padding="0.049cm" fo:border="0.5pt solid #d4e0ee"/>
    </style:style>
    <style:style style:name="Tabla3.E2" style:family="table-cell">
      <style:table-cell-properties style:vertical-align="middle" fo:padding="0.049cm" fo:border="0.5pt solid #d4e0ee"/>
    </style:style>
    <style:style style:name="Tabla3.A3" style:family="table-cell">
      <style:table-cell-properties style:vertical-align="middle" fo:padding="0.049cm" fo:border="0.5pt solid #d4e0ee"/>
    </style:style>
    <style:style style:name="Tabla3.B3" style:family="table-cell">
      <style:table-cell-properties style:vertical-align="middle" fo:padding="0.049cm" fo:border="0.5pt solid #d4e0ee"/>
    </style:style>
    <style:style style:name="Tabla3.C3" style:family="table-cell">
      <style:table-cell-properties style:vertical-align="middle" fo:padding="0.049cm" fo:border="0.5pt solid #d4e0ee"/>
    </style:style>
    <style:style style:name="Tabla3.D3" style:family="table-cell">
      <style:table-cell-properties style:vertical-align="middle" fo:padding="0.049cm" fo:border="0.5pt solid #d4e0ee"/>
    </style:style>
    <style:style style:name="Tabla3.E3" style:family="table-cell">
      <style:table-cell-properties style:vertical-align="middle" fo:padding="0.049cm" fo:border="0.5pt solid #d4e0ee"/>
    </style:style>
    <style:style style:name="Tabla3.A4" style:family="table-cell">
      <style:table-cell-properties style:vertical-align="middle" fo:padding="0.049cm" fo:border="0.5pt solid #d4e0ee"/>
    </style:style>
    <style:style style:name="Tabla3.B4" style:family="table-cell">
      <style:table-cell-properties style:vertical-align="middle" fo:padding="0.049cm" fo:border="0.5pt solid #d4e0ee"/>
    </style:style>
    <style:style style:name="Tabla3.C4" style:family="table-cell">
      <style:table-cell-properties style:vertical-align="middle" fo:padding="0.049cm" fo:border="0.5pt solid #d4e0ee"/>
    </style:style>
    <style:style style:name="Tabla3.D4" style:family="table-cell">
      <style:table-cell-properties style:vertical-align="middle" fo:padding="0.049cm" fo:border="0.5pt solid #d4e0ee"/>
    </style:style>
    <style:style style:name="Tabla3.E4" style:family="table-cell">
      <style:table-cell-properties style:vertical-align="middle" fo:padding="0.049cm" fo:border="0.5pt solid #d4e0ee"/>
    </style:style>
    <style:style style:name="Tabla3.A5" style:family="table-cell">
      <style:table-cell-properties style:vertical-align="middle" fo:padding="0.049cm" fo:border="0.5pt solid #d4e0ee"/>
    </style:style>
    <style:style style:name="Tabla3.B5" style:family="table-cell">
      <style:table-cell-properties style:vertical-align="middle" fo:padding="0.049cm" fo:border="0.5pt solid #d4e0ee"/>
    </style:style>
    <style:style style:name="Tabla3.C5" style:family="table-cell">
      <style:table-cell-properties style:vertical-align="middle" fo:padding="0.049cm" fo:border="0.5pt solid #d4e0ee"/>
    </style:style>
    <style:style style:name="Tabla3.D5" style:family="table-cell">
      <style:table-cell-properties style:vertical-align="middle" fo:padding="0.049cm" fo:border="0.5pt solid #d4e0ee"/>
    </style:style>
    <style:style style:name="Tabla3.E5" style:family="table-cell">
      <style:table-cell-properties style:vertical-align="middle" fo:padding="0.049cm" fo:border="0.5pt solid #d4e0ee"/>
    </style:style>
    <style:style style:name="Tabla3.A6" style:family="table-cell">
      <style:table-cell-properties style:vertical-align="middle" fo:padding="0.049cm" fo:border="0.5pt solid #d4e0ee"/>
    </style:style>
    <style:style style:name="Tabla3.B6" style:family="table-cell">
      <style:table-cell-properties style:vertical-align="middle" fo:padding="0.049cm" fo:border="0.5pt solid #d4e0ee"/>
    </style:style>
    <style:style style:name="Tabla3.C6" style:family="table-cell">
      <style:table-cell-properties style:vertical-align="middle" fo:padding="0.049cm" fo:border="0.5pt solid #d4e0ee"/>
    </style:style>
    <style:style style:name="Tabla3.D6" style:family="table-cell">
      <style:table-cell-properties style:vertical-align="middle" fo:padding="0.049cm" fo:border="0.5pt solid #d4e0ee"/>
    </style:style>
    <style:style style:name="Tabla3.E6" style:family="table-cell">
      <style:table-cell-properties style:vertical-align="middle" fo:padding="0.049cm" fo:border="0.5pt solid #d4e0ee"/>
    </style:style>
    <style:style style:name="Tabla3.A7" style:family="table-cell">
      <style:table-cell-properties style:vertical-align="middle" fo:padding="0.049cm" fo:border="0.5pt solid #d4e0ee"/>
    </style:style>
    <style:style style:name="Tabla3.B7" style:family="table-cell">
      <style:table-cell-properties style:vertical-align="middle" fo:padding="0.049cm" fo:border="0.5pt solid #d4e0ee"/>
    </style:style>
    <style:style style:name="Tabla3.C7" style:family="table-cell">
      <style:table-cell-properties style:vertical-align="middle" fo:padding="0.049cm" fo:border="0.5pt solid #d4e0ee"/>
    </style:style>
    <style:style style:name="Tabla3.D7" style:family="table-cell">
      <style:table-cell-properties style:vertical-align="middle" fo:padding="0.049cm" fo:border="0.5pt solid #d4e0ee"/>
    </style:style>
    <style:style style:name="Tabla3.E7" style:family="table-cell">
      <style:table-cell-properties style:vertical-align="middle" fo:padding="0.049cm" fo:border="0.5pt solid #d4e0ee"/>
    </style:style>
    <style:style style:name="Tabla4" style:family="table">
      <style:table-properties style:width="17cm" table:align="left"/>
    </style:style>
    <style:style style:name="Tabla4.A" style:family="table-column">
      <style:table-column-properties style:column-width="17cm"/>
    </style:style>
    <style:style style:name="Tabla4.1" style:family="table-row">
      <style:table-row-properties fo:background-color="#fcfdfe">
        <style:background-image/>
      </style:table-row-properties>
    </style:style>
    <style:style style:name="Tabla4.A1" style:family="table-cell">
      <style:table-cell-properties style:vertical-align="middle" fo:background-color="#c3dcf7" fo:padding="0.049cm" fo:border="0.5pt solid #d4e0ee">
        <style:background-image/>
      </style:table-cell-properties>
    </style:style>
    <style:style style:name="Tabla4.2" style:family="table-row">
      <style:table-row-properties fo:background-color="#c3dcf7">
        <style:background-image/>
      </style:table-row-properties>
    </style:style>
    <style:style style:name="Tabla4.A2" style:family="table-cell">
      <style:table-cell-properties style:vertical-align="middle" fo:padding="0.049cm" fo:border="0.5pt solid #d4e0e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style:style>
    <style:style style:name="P4" style:family="paragraph" style:parent-style-name="Table_20_Contents">
      <style:paragraph-properties fo:margin-left="0cm" fo:margin-right="0cm" fo:margin-top="0cm" fo:margin-bottom="0cm" style:contextual-spacing="false" fo:text-indent="0cm" style:auto-text-indent="false"/>
      <style:text-properties fo:color="#555555" loext:opacity="100%"/>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P6" style:family="paragraph" style:parent-style-name="Standard">
      <style:paragraph-properties fo:margin-left="0cm" fo:margin-right="0cm" fo:text-indent="0cm" style:auto-text-indent="false"/>
    </style:style>
    <style:style style:name="P7" style:family="paragraph" style:parent-style-name="Heading_20_2">
      <style:paragraph-properties fo:margin-left="0cm" fo:margin-right="0cm" fo:margin-top="0.037cm" fo:margin-bottom="0cm" style:contextual-spacing="false" style:line-height-at-least="0.596cm" fo:text-align="justify" style:justify-single-word="false" fo:text-indent="0cm" style:auto-text-indent="false"/>
      <style:text-properties fo:color="#555555" loext:opacity="100%" style:font-name="Arial2" fo:font-size="15pt" fo:font-weight="bold"/>
    </style:style>
    <style:style style:name="P8" style:family="paragraph" style:parent-style-name="Table_20_Contents" style:list-style-name="L1">
      <style:paragraph-properties fo:margin-left="0cm" fo:margin-right="0cm" fo:text-indent="0cm" style:auto-text-indent="false"/>
      <style:text-properties fo:color="#555555" loext:opacity="100%" style:font-name="HelveticaNeue-Light"/>
    </style:style>
    <style:style style:name="P9" style:family="paragraph" style:parent-style-name="Table_20_Contents" style:list-style-name="L1">
      <style:paragraph-properties fo:margin-left="0cm" fo:margin-right="0cm" fo:margin-top="0cm" fo:margin-bottom="0.499cm" style:contextual-spacing="false" fo:text-indent="0cm" style:auto-text-indent="false"/>
      <style:text-properties fo:color="#555555" loext:opacity="100%" style:font-name="HelveticaNeue-Light"/>
    </style:style>
    <style:style style:name="P10" style:family="paragraph" style:parent-style-name="Table_20_Heading">
      <style:paragraph-properties fo:margin-left="0cm" fo:margin-right="0cm" fo:text-align="center" style:justify-single-word="false" fo:text-indent="0cm" style:auto-text-indent="false"/>
      <style:text-properties fo:color="#153152" loext:opacity="100%" style:font-name="HelveticaNeue-Light" fo:font-size="12pt" fo:font-weight="bold"/>
    </style:style>
    <style:style style:name="P11" style:family="paragraph" style:parent-style-name="Table_20_Contents">
      <style:paragraph-properties fo:margin-left="0cm" fo:margin-right="0cm" fo:text-indent="0cm" style:auto-text-indent="false"/>
      <style:text-properties fo:color="#555555" loext:opacity="100%" style:font-name="HelveticaNeue-Light"/>
    </style:style>
    <style:style style:name="P12" style:family="paragraph" style:parent-style-name="Table_20_Contents">
      <style:text-properties fo:color="#555555" loext:opacity="100%" style:font-name="HelveticaNeue-Light"/>
    </style:style>
    <style:style style:name="P13" style:family="paragraph" style:parent-style-name="Table_20_Contents">
      <style:paragraph-properties fo:margin-left="0cm" fo:margin-right="0cm" fo:margin-top="0cm" fo:margin-bottom="0cm" style:contextual-spacing="false" fo:text-indent="0cm" style:auto-text-indent="false"/>
    </style:style>
    <style:style style:name="P14" style:family="paragraph" style:parent-style-name="Table_20_Contents" style:list-style-name="L2">
      <style:paragraph-properties fo:margin-left="0cm" fo:margin-right="0cm" fo:text-indent="0cm" style:auto-text-indent="false"/>
      <style:text-properties fo:color="#555555" loext:opacity="100%" style:font-name="HelveticaNeue-Light"/>
    </style:style>
    <style:style style:name="P15" style:family="paragraph" style:parent-style-name="Table_20_Contents" style:list-style-name="L2">
      <style:paragraph-properties fo:margin-left="0cm" fo:margin-right="0cm" fo:margin-top="0cm" fo:margin-bottom="0.499cm" style:contextual-spacing="false" fo:text-indent="0cm" style:auto-text-indent="false"/>
      <style:text-properties fo:color="#555555" loext:opacity="100%" style:font-name="HelveticaNeue-Light"/>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color="#555555" loext:opacity="100%" style:font-name="HelveticaNeue-Light" style:font-name-asian="HelveticaNeue-Light" style:font-name-complex="HelveticaNeue-Ligh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Con esta tarea aprenderá a crear un fichero DTD asociado a un esquema dado, a generar un fichero XML que cumpla con lo establecido en el fichero DTD generado y a verificar el documento XML usando el fichero DTD</text:p>
                <text:p text:style-name="P4"> </text:p>
                <text:p text:style-name="P3">Para el desarrollo de esta tarea es necesario estudiar los contenidos de la unidad 4.<text:span text:style-name="T3"/></text:p>
              </table:table-cell>
            </table:table-row>
          </table:table>
          <text:p text:style-name="P5"/>
        </text:section>
      </text:section>
      <text:section text:style-name="Sect1" text:name="id25">
        <text:p text:style-name="P6"/>
        <text:section text:style-name="Sect1" text:name="ta25_1">
          <text:p text:style-name="P1">¿Qué debes hacer?</text:p>
          <table:table table:name="Tabla2" table:style-name="Tabla2">
            <table:table-column table:style-name="Tabla2.A"/>
            <table:table-row table:style-name="Tabla2.1">
              <table:table-cell table:style-name="Tabla2.A1" office:value-type="string">
                <text:p text:style-name="P2"><text:span text:style-name="Strong_20_Emphasis"><text:span text:style-name="T1">ENUNCIADO DE LA TAREA</text:span></text:span><text:span text:style-name="T2"/></text:p>
              </table:table-cell>
            </table:table-row>
            <table:table-row table:style-name="Tabla2.1">
              <table:table-cell table:style-name="Tabla2.A2" office:value-type="string">
                <text:h text:style-name="P7" text:outline-level="2">Descripción de la tarea</text:h>
                <text:p text:style-name="P3">Vamos crear un DTD para describir la información de los discos que tienen a la venta una tienda de discos cualquiera.</text:p>
                <text:p text:style-name="P4"> </text:p>
                <text:p text:style-name="P3">El elemento principal será la tienda, que estará formada por el listado discos que disponen en la tienda para su venta.</text:p>
                <text:p text:style-name="P4"> </text:p>
                <text:p text:style-name="P3">Por cada disco tendremos la siguiente información:</text:p>
                <text:list text:style-name="L1">
                  <text:list-item>
                    <text:p text:style-name="P8">Nombre del disco</text:p>
                  </text:list-item>
                  <text:list-item>
                    <text:p text:style-name="P8">Grupo/Artista</text:p>
                  </text:list-item>
                  <text:list-item>
                    <text:p text:style-name="P8">Año</text:p>
                  </text:list-item>
                  <text:list-item>
                    <text:p text:style-name="P9">Discográfica</text:p>
                  </text:list-item>
                </text:list>
                <text:p text:style-name="P3">Además por cada disco tendremos un atributo donde se indica el tipo del formato del disco (CD, LP, K7, MP3) (!Este dato va en un atributo!)</text:p>
                <text:p text:style-name="P4"> </text:p>
                <text:p text:style-name="P3">Los discos que tiene actualmente la tienda son:</text:p>
                <text:p text:style-name="P4"> </text:p>
                <table:table table:name="Tabla3" table:style-name="Tabla3">
                  <table:table-column table:style-name="Tabla3.A"/>
                  <table:table-column table:style-name="Tabla3.B"/>
                  <table:table-column table:style-name="Tabla3.C"/>
                  <table:table-column table:style-name="Tabla3.D"/>
                  <table:table-column table:style-name="Tabla3.E"/>
                  <table:table-header-rows>
                    <table:table-row table:style-name="Tabla3.1">
                      <table:table-cell table:style-name="Tabla3.A1" office:value-type="string">
                        <text:p text:style-name="P10">Nombre del disco</text:p>
                      </table:table-cell>
                      <table:table-cell table:style-name="Tabla3.A1" office:value-type="string">
                        <text:p text:style-name="P10">Grupo/Artista</text:p>
                      </table:table-cell>
                      <table:table-cell table:style-name="Tabla3.A1" office:value-type="string">
                        <text:p text:style-name="P10">Año</text:p>
                      </table:table-cell>
                      <table:table-cell table:style-name="Tabla3.A1" office:value-type="string">
                        <text:p text:style-name="P10">Discografía</text:p>
                      </table:table-cell>
                      <table:table-cell table:style-name="Tabla3.A1" office:value-type="string">
                        <text:p text:style-name="P10">Formato</text:p>
                      </table:table-cell>
                    </table:table-row>
                  </table:table-header-rows>
                  <table:table-row table:style-name="Tabla3.1">
                    <table:table-cell table:style-name="Tabla3.A2" office:value-type="string">
                      <text:p text:style-name="P11">Sgt. Pepper's Lonely Hearts Club Band</text:p>
                    </table:table-cell>
                    <table:table-cell table:style-name="Tabla3.B2" office:value-type="string">
                      <text:p text:style-name="P11">The Beatles</text:p>
                    </table:table-cell>
                    <table:table-cell table:style-name="Tabla3.C2" office:value-type="string">
                      <text:p text:style-name="P11">1967</text:p>
                    </table:table-cell>
                    <table:table-cell table:style-name="Tabla3.D2" office:value-type="string">
                      <text:p text:style-name="P11">Capitol</text:p>
                    </table:table-cell>
                    <table:table-cell table:style-name="Tabla3.E2" office:value-type="string">
                      <text:p text:style-name="P11">LP</text:p>
                    </table:table-cell>
                  </table:table-row>
                  <table:table-row table:style-name="Tabla3.1">
                    <table:table-cell table:style-name="Tabla3.A3" office:value-type="string">
                      <text:p text:style-name="P11">What's Going On</text:p>
                    </table:table-cell>
                    <table:table-cell table:style-name="Tabla3.B3" office:value-type="string">
                      <text:p text:style-name="P11">Marvin Gaye</text:p>
                    </table:table-cell>
                    <table:table-cell table:style-name="Tabla3.C3" office:value-type="string">
                      <text:p text:style-name="P11">1971</text:p>
                    </table:table-cell>
                    <table:table-cell table:style-name="Tabla3.D3" office:value-type="string">
                      <text:p text:style-name="P11">Motown</text:p>
                    </table:table-cell>
                    <table:table-cell table:style-name="Tabla3.E3" office:value-type="string">
                      <text:p text:style-name="P11">K7</text:p>
                    </table:table-cell>
                  </table:table-row>
                  <table:table-row table:style-name="Tabla3.1">
                    <table:table-cell table:style-name="Tabla3.A4" office:value-type="string">
                      <text:p text:style-name="P11">Blood on the Tracks</text:p>
                    </table:table-cell>
                    <table:table-cell table:style-name="Tabla3.B4" office:value-type="string">
                      <text:p text:style-name="P11">Bob Dylan</text:p>
                    </table:table-cell>
                    <table:table-cell table:style-name="Tabla3.C4" office:value-type="string">
                      <text:p text:style-name="P11">1975</text:p>
                    </table:table-cell>
                    <table:table-cell table:style-name="Tabla3.D4" office:value-type="string">
                      <text:p text:style-name="P11">Columbia</text:p>
                    </table:table-cell>
                    <table:table-cell table:style-name="Tabla3.E4" office:value-type="string">
                      <text:p text:style-name="P11">LP</text:p>
                    </table:table-cell>
                  </table:table-row>
                  <table:table-row table:style-name="Tabla3.1">
                    <table:table-cell table:style-name="Tabla3.A5" office:value-type="string">
                      <text:p text:style-name="P11">Back to Mono (1958-1969)</text:p>
                    </table:table-cell>
                    <table:table-cell table:style-name="Tabla3.B5" office:value-type="string">
                      <text:p text:style-name="P11">Phil Spector</text:p>
                    </table:table-cell>
                    <table:table-cell table:style-name="Tabla3.C5" office:value-type="string">
                      <text:p text:style-name="P11">1991</text:p>
                    </table:table-cell>
                    <table:table-cell table:style-name="Tabla3.D5" office:value-type="string">
                      <text:p text:style-name="P11">Abkco</text:p>
                    </table:table-cell>
                    <table:table-cell table:style-name="Tabla3.E5" office:value-type="string">
                      <text:p text:style-name="P11">CD</text:p>
                    </table:table-cell>
                  </table:table-row>
                  <table:table-row table:style-name="Tabla3.1">
                    <table:table-cell table:style-name="Tabla3.A6" office:value-type="string">
                      <text:p text:style-name="P11">Physical Graffiti</text:p>
                    </table:table-cell>
                    <table:table-cell table:style-name="Tabla3.B6" office:value-type="string">
                      <text:p text:style-name="P11">Led Zeppelin</text:p>
                    </table:table-cell>
                    <table:table-cell table:style-name="Tabla3.C6" office:value-type="string">
                      <text:p text:style-name="P11">1975</text:p>
                    </table:table-cell>
                    <table:table-cell table:style-name="Tabla3.D6" office:value-type="string">
                      <text:p text:style-name="P11">Atlantic</text:p>
                    </table:table-cell>
                    <table:table-cell table:style-name="Tabla3.E6" office:value-type="string">
                      <text:p text:style-name="P11">LP</text:p>
                    </table:table-cell>
                  </table:table-row>
                  <table:table-row table:style-name="Tabla3.1">
                    <table:table-cell table:style-name="Tabla3.A7" office:value-type="string">
                      <text:p text:style-name="P11">Back In Black</text:p>
                    </table:table-cell>
                    <table:table-cell table:style-name="Tabla3.B7" office:value-type="string">
                      <text:p text:style-name="P11">AC/DC</text:p>
                    </table:table-cell>
                    <table:table-cell table:style-name="Tabla3.C7" office:value-type="string">
                      <text:p text:style-name="P11">1980</text:p>
                    </table:table-cell>
                    <table:table-cell table:style-name="Tabla3.D7" office:value-type="string">
                      <text:p text:style-name="P11">Atlantic</text:p>
                    </table:table-cell>
                    <table:table-cell table:style-name="Tabla3.E7" office:value-type="string">
                      <text:p text:style-name="P12">K7</text:p>
                    </table:table-cell>
                  </table:table-row>
                </table:table>
                <text:p text:style-name="P13"/>
                <text:h text:style-name="P7" text:outline-level="2">RA04_d) Se han creado descripciones de documentos XML. </text:h>
                <text:p text:style-name="P3">Debemos crear un fichero DTD que defina los diferentes nodos que vamos a tener que utilizar para recoger la información anterior. (DISCOS.DTD)</text:p>
                <text:h text:style-name="P7" text:outline-level="2">RA04_e) Se han utilizado descripciones en la elaboración y validación de documentos XML.</text:h>
                <text:p text:style-name="P3">Teniendo en cuenta el fichero DTD generado, debemos crear un fichero XML que se adapte al DTD anterior, que recoja toda la información de la tabla y que cumpla con lo especificado en el fichero DTD. (DISCOS.XML)</text:p>
                <text:h text:style-name="P7" text:outline-level="2">RA04_f)  Se han asociado las descripciones con los documentos.</text:h>
                <text:p text:style-name="P3"><text:soft-page-break/>Indicar donde corresponda la asociación entre los ficheros creados. (DISCOS.XML y DISCOS.DTD)</text:p>
                <text:h text:style-name="P7" text:outline-level="2">RA04_g) Se han utilizado herramientas específicas.</text:h>
                <text:p text:style-name="P3">Utilizando el programa XML Copy Editor, verificar que el fichero XML generado cumple con lo establecido en el fichero de descripción DTD generado. En caso de no cumplir lo establecido, modificar el fichero XML para que sea completamente válido. </text:p>
                <text:p text:style-name="P3">Realizar capturas donde se muestre que:</text:p>
                <text:list text:style-name="L2">
                  <text:list-item>
                    <text:p text:style-name="P14">El XML está bien formado</text:p>
                  </text:list-item>
                  <text:list-item>
                    <text:p text:style-name="P15">El XML junto con el DTD se valida correctamente<text:span text:style-name="T3"/></text:p>
                  </text:list-item>
                </text:list>
              </table:table-cell>
            </table:table-row>
          </table:table>
          <text:p text:style-name="P5"/>
        </text:section>
      </text:section>
      <text:section text:style-name="Sect1" text:name="id26">
        <text:p text:style-name="P6"/>
        <text:section text:style-name="Sect1" text:name="ta26_1">
          <text:p text:style-name="P1">¿Qué debes tener en cuenta para resolver la tarea?</text:p>
          <table:table table:name="Tabla4" table:style-name="Tabla4">
            <table:table-column table:style-name="Tabla4.A"/>
            <table:table-row table:style-name="Tabla4.1">
              <table:table-cell table:style-name="Tabla4.A1" office:value-type="string">
                <text:p text:style-name="P2"><text:span text:style-name="Strong_20_Emphasis"><text:span text:style-name="T1">CONSEJOS Y RECOMENDACIONES PARA REALIZAR LA TAREA.</text:span></text:span><text:span text:style-name="T2"/></text:p>
              </table:table-cell>
            </table:table-row>
            <table:table-row table:style-name="Tabla4.2">
              <table:table-cell table:style-name="Tabla4.A2" office:value-type="string">
                <text:p text:style-name="P3">Para realizar esta tarea es aconsejable revisar los contenidos de la Unidad 4 del curso.</text:p>
                <text:p text:style-name="P3">Para afrontar esta tarea es aconsejable segur los siguientes pasos:</text:p>
                <text:p text:style-name="P3">1. Crear el fichero XML bien formado que recoja los datos que se piden.</text:p>
                <text:p text:style-name="P3">2. Construir el fichero DTD de acuerdo a la construcción XML realizada. (Los pasos 1 y 2 se pueden intercambiar en el orden de realización) </text:p>
                <text:p text:style-name="P3">3. Pasar  los controles para comprobar que es válido el XML creado.<text:span text:style-name="T3"/></text:p>
              </table:table-cell>
            </table:table-row>
          </table:table>
          <text:p text:style-name="P5"/>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10:40:31.324917400</meta:creation-date>
    <dc:date>2026-06-15T10:40:55.883511800</dc:date>
    <meta:editing-duration>PT24S</meta:editing-duration>
    <meta:editing-cycles>1</meta:editing-cycles>
    <meta:document-statistic meta:table-count="4" meta:image-count="0" meta:object-count="0" meta:page-count="2" meta:paragraph-count="74" meta:word-count="484" meta:character-count="2829" meta:non-whitespace-character-count="2410"/>
    <meta:generator>LibreOffice/26.2.3.2$Windows_X86_64 LibreOffice_project/70e089b17412e4cb7773e41413306b17a2328c34</meta:generator>
  </office:meta>
</office:document-meta>
</file>