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6200000114E6570D77.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9.546cm" table:align="left"/>
    </style:style>
    <style:style style:name="Tabla2.A" style:family="table-column">
      <style:table-column-properties style:column-width="19.546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5.734cm" table:align="left"/>
    </style:style>
    <style:style style:name="Tabla3.A" style:family="table-column">
      <style:table-column-properties style:column-width="7.5cm"/>
    </style:style>
    <style:style style:name="Tabla3.B" style:family="table-column">
      <style:table-column-properties style:column-width="2.861cm"/>
    </style:style>
    <style:style style:name="Tabla3.C" style:family="table-column">
      <style:table-column-properties style:column-width="1.076cm"/>
    </style:style>
    <style:style style:name="Tabla3.D" style:family="table-column">
      <style:table-column-properties style:column-width="2.441cm"/>
    </style:style>
    <style:style style:name="Tabla3.E" style:family="table-column">
      <style:table-column-properties style:column-width="1.856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Tabla3.B2" style:family="table-cell">
      <style:table-cell-properties style:vertical-align="middle" fo:padding="0.049cm" fo:border="0.5pt solid #d4e0ee"/>
    </style:style>
    <style:style style:name="Tabla3.C2" style:family="table-cell">
      <style:table-cell-properties style:vertical-align="middle" fo:padding="0.049cm" fo:border="0.5pt solid #d4e0ee"/>
    </style:style>
    <style:style style:name="Tabla3.D2" style:family="table-cell">
      <style:table-cell-properties style:vertical-align="middle" fo:padding="0.049cm" fo:border="0.5pt solid #d4e0ee"/>
    </style:style>
    <style:style style:name="Tabla3.E2" style:family="table-cell">
      <style:table-cell-properties style:vertical-align="middle" fo:padding="0.049cm" fo:border="0.5pt solid #d4e0ee"/>
    </style:style>
    <style:style style:name="Tabla3.A3" style:family="table-cell">
      <style:table-cell-properties style:vertical-align="middle" fo:padding="0.049cm" fo:border="0.5pt solid #d4e0ee"/>
    </style:style>
    <style:style style:name="Tabla3.B3" style:family="table-cell">
      <style:table-cell-properties style:vertical-align="middle" fo:padding="0.049cm" fo:border="0.5pt solid #d4e0ee"/>
    </style:style>
    <style:style style:name="Tabla3.C3" style:family="table-cell">
      <style:table-cell-properties style:vertical-align="middle" fo:padding="0.049cm" fo:border="0.5pt solid #d4e0ee"/>
    </style:style>
    <style:style style:name="Tabla3.D3" style:family="table-cell">
      <style:table-cell-properties style:vertical-align="middle" fo:padding="0.049cm" fo:border="0.5pt solid #d4e0ee"/>
    </style:style>
    <style:style style:name="Tabla3.E3" style:family="table-cell">
      <style:table-cell-properties style:vertical-align="middle" fo:padding="0.049cm" fo:border="0.5pt solid #d4e0ee"/>
    </style:style>
    <style:style style:name="Tabla3.A4" style:family="table-cell">
      <style:table-cell-properties style:vertical-align="middle" fo:padding="0.049cm" fo:border="0.5pt solid #d4e0ee"/>
    </style:style>
    <style:style style:name="Tabla3.B4" style:family="table-cell">
      <style:table-cell-properties style:vertical-align="middle" fo:padding="0.049cm" fo:border="0.5pt solid #d4e0ee"/>
    </style:style>
    <style:style style:name="Tabla3.C4" style:family="table-cell">
      <style:table-cell-properties style:vertical-align="middle" fo:padding="0.049cm" fo:border="0.5pt solid #d4e0ee"/>
    </style:style>
    <style:style style:name="Tabla3.D4" style:family="table-cell">
      <style:table-cell-properties style:vertical-align="middle" fo:padding="0.049cm" fo:border="0.5pt solid #d4e0ee"/>
    </style:style>
    <style:style style:name="Tabla3.E4" style:family="table-cell">
      <style:table-cell-properties style:vertical-align="middle" fo:padding="0.049cm" fo:border="0.5pt solid #d4e0ee"/>
    </style:style>
    <style:style style:name="Tabla3.A5" style:family="table-cell">
      <style:table-cell-properties style:vertical-align="middle" fo:padding="0.049cm" fo:border="0.5pt solid #d4e0ee"/>
    </style:style>
    <style:style style:name="Tabla3.B5" style:family="table-cell">
      <style:table-cell-properties style:vertical-align="middle" fo:padding="0.049cm" fo:border="0.5pt solid #d4e0ee"/>
    </style:style>
    <style:style style:name="Tabla3.C5" style:family="table-cell">
      <style:table-cell-properties style:vertical-align="middle" fo:padding="0.049cm" fo:border="0.5pt solid #d4e0ee"/>
    </style:style>
    <style:style style:name="Tabla3.D5" style:family="table-cell">
      <style:table-cell-properties style:vertical-align="middle" fo:padding="0.049cm" fo:border="0.5pt solid #d4e0ee"/>
    </style:style>
    <style:style style:name="Tabla3.E5" style:family="table-cell">
      <style:table-cell-properties style:vertical-align="middle" fo:padding="0.049cm" fo:border="0.5pt solid #d4e0ee"/>
    </style:style>
    <style:style style:name="Tabla3.A6" style:family="table-cell">
      <style:table-cell-properties style:vertical-align="middle" fo:padding="0.049cm" fo:border="0.5pt solid #d4e0ee"/>
    </style:style>
    <style:style style:name="Tabla3.B6" style:family="table-cell">
      <style:table-cell-properties style:vertical-align="middle" fo:padding="0.049cm" fo:border="0.5pt solid #d4e0ee"/>
    </style:style>
    <style:style style:name="Tabla3.C6" style:family="table-cell">
      <style:table-cell-properties style:vertical-align="middle" fo:padding="0.049cm" fo:border="0.5pt solid #d4e0ee"/>
    </style:style>
    <style:style style:name="Tabla3.D6" style:family="table-cell">
      <style:table-cell-properties style:vertical-align="middle" fo:padding="0.049cm" fo:border="0.5pt solid #d4e0ee"/>
    </style:style>
    <style:style style:name="Tabla3.E6" style:family="table-cell">
      <style:table-cell-properties style:vertical-align="middle" fo:padding="0.049cm" fo:border="0.5pt solid #d4e0ee"/>
    </style:style>
    <style:style style:name="Tabla3.A7" style:family="table-cell">
      <style:table-cell-properties style:vertical-align="middle" fo:padding="0.049cm" fo:border="0.5pt solid #d4e0ee"/>
    </style:style>
    <style:style style:name="Tabla3.B7" style:family="table-cell">
      <style:table-cell-properties style:vertical-align="middle" fo:padding="0.049cm" fo:border="0.5pt solid #d4e0ee"/>
    </style:style>
    <style:style style:name="Tabla3.C7" style:family="table-cell">
      <style:table-cell-properties style:vertical-align="middle" fo:padding="0.049cm" fo:border="0.5pt solid #d4e0ee"/>
    </style:style>
    <style:style style:name="Tabla3.D7" style:family="table-cell">
      <style:table-cell-properties style:vertical-align="middle" fo:padding="0.049cm" fo:border="0.5pt solid #d4e0ee"/>
    </style:style>
    <style:style style:name="Tabla3.E7" style:family="table-cell">
      <style:table-cell-properties style:vertical-align="middle" fo:padding="0.049cm" fo:border="0.5pt solid #d4e0ee"/>
    </style:style>
    <style:style style:name="Tabla4" style:family="table">
      <style:table-properties style:width="17cm" table:align="left"/>
    </style:style>
    <style:style style:name="Tabla4.A" style:family="table-column">
      <style:table-column-properties style:column-width="17cm"/>
    </style:style>
    <style:style style:name="Tabla4.1" style:family="table-row">
      <style:table-row-properties fo:background-color="#fcfdfe">
        <style:background-image/>
      </style:table-row-properties>
    </style:style>
    <style:style style:name="Tabla4.A1" style:family="table-cell">
      <style:table-cell-properties style:vertical-align="middle" fo:background-color="#c3dcf7" fo:padding="0.049cm" fo:border="0.5pt solid #d4e0ee">
        <style:background-image/>
      </style:table-cell-properties>
    </style:style>
    <style:style style:name="Tabla4.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6" style:family="paragraph" style:parent-style-name="Standard">
      <style:paragraph-properties fo:margin-left="0cm" fo:margin-right="0cm" fo:text-indent="0cm" style:auto-text-indent="false"/>
    </style:style>
    <style:style style:name="P7" style:family="paragraph" style:parent-style-name="Heading_20_2">
      <style:paragraph-properties fo:margin-left="0cm" fo:margin-right="0cm" fo:margin-top="0.037cm" fo:margin-bottom="0cm" style:contextual-spacing="false" style:line-height-at-least="0.596cm" fo:text-align="justify" style:justify-single-word="false" fo:text-indent="0cm" style:auto-text-indent="false"/>
      <style:text-properties fo:color="#555555" loext:opacity="100%" style:font-name="Arial2" fo:font-size="15pt" fo:font-weight="bold"/>
    </style:style>
    <style:style style:name="P8" style:family="paragraph" style:parent-style-name="Table_20_Contents" style:list-style-name="L1">
      <style:paragraph-properties fo:margin-left="0cm" fo:margin-right="0cm" fo:text-indent="0cm" style:auto-text-indent="false"/>
      <style:text-properties fo:color="#555555" loext:opacity="100%" style:font-name="HelveticaNeue-Light"/>
    </style:style>
    <style:style style:name="P9" style:family="paragraph" style:parent-style-name="Table_20_Contents" style:list-style-name="L1">
      <style:paragraph-properties fo:margin-left="0cm" fo:margin-right="0cm" fo:margin-top="0cm" fo:margin-bottom="0.499cm" style:contextual-spacing="false" fo:text-indent="0cm" style:auto-text-indent="false"/>
      <style:text-properties fo:color="#555555" loext:opacity="100%" style:font-name="HelveticaNeue-Light"/>
    </style:style>
    <style:style style:name="P10" style:family="paragraph" style:parent-style-name="Table_20_Heading">
      <style:paragraph-properties fo:margin-left="0cm" fo:margin-right="0cm" fo:text-align="center" style:justify-single-word="false" fo:text-indent="0cm" style:auto-text-indent="false"/>
      <style:text-properties fo:color="#153152" loext:opacity="100%" style:font-name="HelveticaNeue-Light" fo:font-size="12pt" fo:font-weight="bold"/>
    </style:style>
    <style:style style:name="P11" style:family="paragraph" style:parent-style-name="Table_20_Contents">
      <style:paragraph-properties fo:margin-left="0cm" fo:margin-right="0cm" fo:text-indent="0cm" style:auto-text-indent="false"/>
      <style:text-properties fo:color="#555555" loext:opacity="100%" style:font-name="HelveticaNeue-Light"/>
    </style:style>
    <style:style style:name="P12" style:family="paragraph" style:parent-style-name="Table_20_Contents">
      <style:text-properties fo:color="#555555" loext:opacity="100%" style:font-name="HelveticaNeue-Light"/>
    </style:style>
    <style:style style:name="P13" style:family="paragraph" style:parent-style-name="Table_20_Contents">
      <style:paragraph-properties fo:margin-top="0cm" fo:margin-bottom="0.499cm" style:contextual-spacing="false"/>
    </style:style>
    <style:style style:name="P14" style:family="paragraph" style:parent-style-name="Table_20_Contents" style:list-style-name="L2">
      <style:paragraph-properties fo:margin-left="0cm" fo:margin-right="0cm" fo:text-indent="0cm" style:auto-text-indent="false"/>
    </style:style>
    <style:style style:name="P15" style:family="paragraph" style:parent-style-name="Table_20_Contents" style:list-style-name="L2">
      <style:paragraph-properties fo:margin-left="0cm" fo:margin-right="0cm" fo:margin-top="0cm" fo:margin-bottom="0.499cm" style:contextual-spacing="false" fo:text-indent="0cm" style:auto-text-indent="false"/>
    </style:style>
    <style:style style:name="P16"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Arial2" fo:font-size="15pt" fo:font-weight="bold"/>
    </style:style>
    <style:style style:name="P17" style:family="paragraph" style:parent-style-name="Table_20_Contents" style:list-style-name="L3">
      <style:paragraph-properties fo:margin-left="0cm" fo:margin-right="0cm" fo:text-indent="0cm" style:auto-text-indent="false"/>
      <style:text-properties fo:color="#555555" loext:opacity="100%" style:font-name="HelveticaNeue-Light"/>
    </style:style>
    <style:style style:name="P18" style:family="paragraph" style:parent-style-name="Table_20_Contents" style:list-style-name="L3">
      <style:paragraph-properties fo:margin-left="0cm" fo:margin-right="0cm" fo:margin-top="0cm" fo:margin-bottom="0.499cm" style:contextual-spacing="false" fo:text-indent="0cm" style:auto-text-indent="false"/>
      <style:text-properties fo:color="#555555" loext:opacity="100%" style:font-name="HelveticaNeue-Ligh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font-name="HelveticaNeue-Ligh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aprenderá a crear un fichero XSLT que aplique las reglas necesarias para visualizar los datos de un XML según el formato de salida pedido en esta tarea.</text:p>
                <text:p text:style-name="P4"> </text:p>
                <text:p text:style-name="P3">Para el desarrollo de esta tarea es necesario estudiar los contenidos de la unidad 6.<text:span text:style-name="T3"/></text:p>
              </table:table-cell>
            </table:table-row>
          </table:table>
          <text:p text:style-name="P5"/>
        </text:section>
      </text:section>
      <text:section text:style-name="Sect1" text:name="id25">
        <text:p text:style-name="P6"/>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h text:style-name="P7" text:outline-level="2">Descripción de la tarea</text:h>
                <text:p text:style-name="P3">Vamos a crear un XML a partir de los datos que tenemos en la tabla siguiente:</text:p>
                <text:p text:style-name="P4"> </text:p>
                <text:p text:style-name="P3">El elemento principal será la tienda, que estará formada por el listado discos que disponen en la tienda para su venta.</text:p>
                <text:p text:style-name="P4"> </text:p>
                <text:p text:style-name="P3">Por cada disco tendremos la siguiente información (son todo etiquetas, no hay atributos):</text:p>
                <text:list text:style-name="L1">
                  <text:list-item>
                    <text:p text:style-name="P8">Nombre del disco</text:p>
                  </text:list-item>
                  <text:list-item>
                    <text:p text:style-name="P8">Grupo/Artista</text:p>
                  </text:list-item>
                  <text:list-item>
                    <text:p text:style-name="P8">Año</text:p>
                  </text:list-item>
                  <text:list-item>
                    <text:p text:style-name="P8">Discográfica</text:p>
                  </text:list-item>
                  <text:list-item>
                    <text:p text:style-name="P9">Formato</text:p>
                  </text:list-item>
                </text:list>
                <text:p text:style-name="P4"> </text:p>
                <text:p text:style-name="P3">Los discos que tiene actualmente la tienda son:</text:p>
                <text:p text:style-name="P4"> </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P10">Nombre del disco</text:p>
                      </table:table-cell>
                      <table:table-cell table:style-name="Tabla3.A1" office:value-type="string">
                        <text:p text:style-name="P10">Grupo/Artista</text:p>
                      </table:table-cell>
                      <table:table-cell table:style-name="Tabla3.A1" office:value-type="string">
                        <text:p text:style-name="P10">Año</text:p>
                      </table:table-cell>
                      <table:table-cell table:style-name="Tabla3.A1" office:value-type="string">
                        <text:p text:style-name="P10">Discografía</text:p>
                      </table:table-cell>
                      <table:table-cell table:style-name="Tabla3.A1" office:value-type="string">
                        <text:p text:style-name="P10">Formato</text:p>
                      </table:table-cell>
                    </table:table-row>
                  </table:table-header-rows>
                  <table:table-row table:style-name="Tabla3.1">
                    <table:table-cell table:style-name="Tabla3.A2" office:value-type="string">
                      <text:p text:style-name="P11">Sgt. Pepper's Lonely Hearts Club Band</text:p>
                    </table:table-cell>
                    <table:table-cell table:style-name="Tabla3.B2" office:value-type="string">
                      <text:p text:style-name="P11">The Beatles</text:p>
                    </table:table-cell>
                    <table:table-cell table:style-name="Tabla3.C2" office:value-type="string">
                      <text:p text:style-name="P11">1967</text:p>
                    </table:table-cell>
                    <table:table-cell table:style-name="Tabla3.D2" office:value-type="string">
                      <text:p text:style-name="P11">Capitol</text:p>
                    </table:table-cell>
                    <table:table-cell table:style-name="Tabla3.E2" office:value-type="string">
                      <text:p text:style-name="P11">LP</text:p>
                    </table:table-cell>
                  </table:table-row>
                  <table:table-row table:style-name="Tabla3.1">
                    <table:table-cell table:style-name="Tabla3.A3" office:value-type="string">
                      <text:p text:style-name="P11">What's Going On</text:p>
                    </table:table-cell>
                    <table:table-cell table:style-name="Tabla3.B3" office:value-type="string">
                      <text:p text:style-name="P11">Marvin Gaye</text:p>
                    </table:table-cell>
                    <table:table-cell table:style-name="Tabla3.C3" office:value-type="string">
                      <text:p text:style-name="P11">1971</text:p>
                    </table:table-cell>
                    <table:table-cell table:style-name="Tabla3.D3" office:value-type="string">
                      <text:p text:style-name="P11">Motown</text:p>
                    </table:table-cell>
                    <table:table-cell table:style-name="Tabla3.E3" office:value-type="string">
                      <text:p text:style-name="P11">K7</text:p>
                    </table:table-cell>
                  </table:table-row>
                  <table:table-row table:style-name="Tabla3.1">
                    <table:table-cell table:style-name="Tabla3.A4" office:value-type="string">
                      <text:p text:style-name="P11">Blood on the Tracks</text:p>
                    </table:table-cell>
                    <table:table-cell table:style-name="Tabla3.B4" office:value-type="string">
                      <text:p text:style-name="P11">Bob Dylan</text:p>
                    </table:table-cell>
                    <table:table-cell table:style-name="Tabla3.C4" office:value-type="string">
                      <text:p text:style-name="P11">1975</text:p>
                    </table:table-cell>
                    <table:table-cell table:style-name="Tabla3.D4" office:value-type="string">
                      <text:p text:style-name="P11">Columbia</text:p>
                    </table:table-cell>
                    <table:table-cell table:style-name="Tabla3.E4" office:value-type="string">
                      <text:p text:style-name="P11">LP</text:p>
                    </table:table-cell>
                  </table:table-row>
                  <table:table-row table:style-name="Tabla3.1">
                    <table:table-cell table:style-name="Tabla3.A5" office:value-type="string">
                      <text:p text:style-name="P11">Back to Mono (1958-1969)</text:p>
                    </table:table-cell>
                    <table:table-cell table:style-name="Tabla3.B5" office:value-type="string">
                      <text:p text:style-name="P11">Phil Spector</text:p>
                    </table:table-cell>
                    <table:table-cell table:style-name="Tabla3.C5" office:value-type="string">
                      <text:p text:style-name="P11">1991</text:p>
                    </table:table-cell>
                    <table:table-cell table:style-name="Tabla3.D5" office:value-type="string">
                      <text:p text:style-name="P11">Abkco</text:p>
                    </table:table-cell>
                    <table:table-cell table:style-name="Tabla3.E5" office:value-type="string">
                      <text:p text:style-name="P11">CD</text:p>
                    </table:table-cell>
                  </table:table-row>
                  <table:table-row table:style-name="Tabla3.1">
                    <table:table-cell table:style-name="Tabla3.A6" office:value-type="string">
                      <text:p text:style-name="P11">Physical Graffiti</text:p>
                    </table:table-cell>
                    <table:table-cell table:style-name="Tabla3.B6" office:value-type="string">
                      <text:p text:style-name="P11">Led Zeppelin</text:p>
                    </table:table-cell>
                    <table:table-cell table:style-name="Tabla3.C6" office:value-type="string">
                      <text:p text:style-name="P11">1975</text:p>
                    </table:table-cell>
                    <table:table-cell table:style-name="Tabla3.D6" office:value-type="string">
                      <text:p text:style-name="P11">Atlantic</text:p>
                    </table:table-cell>
                    <table:table-cell table:style-name="Tabla3.E6" office:value-type="string">
                      <text:p text:style-name="P11">LP</text:p>
                    </table:table-cell>
                  </table:table-row>
                  <table:table-row table:style-name="Tabla3.1">
                    <table:table-cell table:style-name="Tabla3.A7" office:value-type="string">
                      <text:p text:style-name="P11">Back In Black</text:p>
                    </table:table-cell>
                    <table:table-cell table:style-name="Tabla3.B7" office:value-type="string">
                      <text:p text:style-name="P11">AC/DC</text:p>
                    </table:table-cell>
                    <table:table-cell table:style-name="Tabla3.C7" office:value-type="string">
                      <text:p text:style-name="P11">1980</text:p>
                    </table:table-cell>
                    <table:table-cell table:style-name="Tabla3.D7" office:value-type="string">
                      <text:p text:style-name="P11">Atlantic</text:p>
                    </table:table-cell>
                    <table:table-cell table:style-name="Tabla3.E7" office:value-type="string">
                      <text:p text:style-name="P12">K7</text:p>
                    </table:table-cell>
                  </table:table-row>
                </table:table>
                <text:p text:style-name="P13"/>
                <text:p text:style-name="P3"><text:line-break/>Mostrar una captura de la visualización del XML en el navegador deseado, sin aplicar ninguna de las tecnologias que usaremos en la tarea, mostrar solamente el XML en el navegador.</text:p>
                <text:p text:style-name="P3">Para la resolución de la tarea, será necesario crear los siguientes ficheros:</text:p>
                <text:list text:style-name="L2">
                  <text:list-item>
                    <text:p text:style-name="P14"><text:span text:style-name="Strong_20_Emphasis"><text:span text:style-name="Emphasis"><text:span text:style-name="T4">DISCOS.XML</text:span></text:span></text:span></text:p>
                  </text:list-item>
                  <text:list-item>
                    <text:p text:style-name="P14"><text:span text:style-name="Strong_20_Emphasis"><text:span text:style-name="Emphasis"><text:span text:style-name="T4">DISCOS.CSS</text:span></text:span></text:span></text:p>
                  </text:list-item>
                  <text:list-item>
                    <text:p text:style-name="P15"><text:span text:style-name="Strong_20_Emphasis"><text:span text:style-name="Emphasis"><text:span text:style-name="T4">DISCOS.XSLT</text:span></text:span></text:span></text:p>
                  </text:list-item>
                </text:list>
                <text:p text:style-name="P4"> </text:p>
                <text:h text:style-name="P7" text:outline-level="2">RA05_d) Se ha descrito la sintaxis específica utilizada en la conversión y adaptación de documentos XML.</text:h>
                <text:p text:style-name="P3"><text:soft-page-break/><text:line-break/>Indicar a través de qué sentencias se encadenan:</text:p>
                <text:p text:style-name="P3">1 - El fichero XML con el XSLT</text:p>
                <text:p text:style-name="P3">2 - El fichero XSLT con el CSS</text:p>
                <text:p text:style-name="P16">RA05_e) Se han creado especificaciones de conversión. </text:p>
                <text:p text:style-name="P3"><text:line-break/>Deseamos que la salida que vemos a través del navegador se haga en forma de tabla que estará formada por:</text:p>
                <text:list text:style-name="L3">
                  <text:list-item>
                    <text:p text:style-name="P17">Un encabezado</text:p>
                  </text:list-item>
                  <text:list-item>
                    <text:p text:style-name="P18">Filas de colores alternos</text:p>
                  </text:list-item>
                </text:list>
                <text:p text:style-name="P3">(todo lo que el alumno le desee añadir  para  mejorar la presentación)</text:p>
                <text:p text:style-name="P3">Por ejemplo:</text:p>
                <text:p text:style-name="P4"><draw:frame draw:style-name="fr1" draw:name="Imagen1" text:anchor-type="as-char" svg:width="19.341cm" svg:height="6.165cm" draw:z-index="0"><draw:image xlink:href="Pictures/100000000000036200000114E6570D77.jpg" xlink:type="simple" xlink:show="embed" xlink:actuate="onLoad" draw:mime-type="image/jpeg"/></draw:frame></text:p>
                <text:h text:style-name="P7" text:outline-level="2">RA05_f) Se han identificado y caracterizado herramientas específicas relacionadas con la conversión de documentos</text:h>
                <text:p text:style-name="P3"><text:line-break/>Las reglas necesarias para la conversión irán dentro de un fichero XSLT y todas las reglas de estilos irán dentro de un CSS.</text:p>
                <text:h text:style-name="P7" text:outline-level="2">RA05_g) Se han realizado conversiones con distintos formatos de salida.</text:h>
                <text:p text:style-name="P3"><text:line-break/>Una vez funcione todo correctamente indicar los cambios necesarios a realizar para que que sólo se vean los discos anteriores a 1979.</text:p>
                <text:p text:style-name="P3">El alumno deberá dejar constancia de los resultados a través de capturas que se adjuntarán en el informe.</text:p>
                <text:p text:style-name="P3">Es decir en el informe se dejará constancia, tanto de las reglas en el XSLT como de la visualización de todos los datos del XML y tambien de las modificaciones realizadas y de la visualización de los datos filtrados según la condición exigida en el punto anterior.</text:p>
                <text:p text:style-name="P3"><text:line-break/>El alumno puede usar XML Copy Editor o cualquier otra herramienta para la elaboración de los ficheros que se piden. La visualización se realizará con el navegador que desee el alumno. Todo se deberá de especificar en el informe, para que no haya problemas en las posibles pruebas.<text:span text:style-name="T3"/></text:p>
              </table:table-cell>
            </table:table-row>
          </table:table>
          <text:p text:style-name="P5"/>
        </text:section>
      </text:section>
      <text:section text:style-name="Sect1" text:name="id26">
        <text:p text:style-name="P6"/>
        <text:section text:style-name="Sect1" text:name="ta26_1">
          <text:p text:style-name="P1">¿Qué debes tener en cuenta para resolver la tarea?</text:p>
          <table:table table:name="Tabla4" table:style-name="Tabla4">
            <table:table-column table:style-name="Tabla4.A"/>
            <table:table-row table:style-name="Tabla4.1">
              <table:table-cell table:style-name="Tabla4.A1" office:value-type="string">
                <text:p text:style-name="P2"><text:span text:style-name="Strong_20_Emphasis"><text:span text:style-name="T1">CONSEJOS Y RECOMENDACIONES PARA REALIZAR LA TAREA.</text:span></text:span><text:span text:style-name="T2"/></text:p>
              </table:table-cell>
            </table:table-row>
            <text:soft-page-break/>
            <table:table-row table:style-name="Tabla4.1">
              <table:table-cell table:style-name="Tabla4.A2" office:value-type="string">
                <text:p text:style-name="P3">Para realizar esta tarea es aconsejable revisar los contenidos de la Unidad 6 del curso.</text:p>
                <text:p text:style-name="P3">Para afrontar esta tarea es aconsejable segur los siguientes pasos:</text:p>
                <text:p text:style-name="P3">1. Crear el fichero XML bien formado que recoja los datos que se piden.</text:p>
                <text:p text:style-name="P3">2. Construir el fichero XSLT de acuerdo a los requisitos que pide la tarea. </text:p>
                <text:p text:style-name="P3">3. Crear el CSS con las reglas que apliquen los formatos deseados por el alumno.</text:p>
                <text:p text:style-name="P3">4. Modificar el XSLT para mostrar solo los datos que cumplen las condiciones pedidas.<text:span text:style-name="T3"/></text:p>
              </table:table-cell>
            </table:table-row>
          </table:table>
          <text:p text:style-name="P5"/>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41:49.950034700</meta:creation-date>
    <dc:date>2026-06-15T10:42:09.851183000</dc:date>
    <meta:editing-duration>PT20S</meta:editing-duration>
    <meta:editing-cycles>1</meta:editing-cycles>
    <meta:document-statistic meta:table-count="4" meta:image-count="1" meta:object-count="0" meta:page-count="3" meta:paragraph-count="88" meta:word-count="609" meta:character-count="3510" meta:non-whitespace-character-count="2976"/>
    <meta:generator>LibreOffice/26.2.3.2$Windows_X86_64 LibreOffice_project/70e089b17412e4cb7773e41413306b17a2328c34</meta:generator>
  </office:meta>
</office:document-meta>
</file>