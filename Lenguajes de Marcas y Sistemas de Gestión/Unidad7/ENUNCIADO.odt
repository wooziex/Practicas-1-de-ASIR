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17cm"/>
    </style:style>
    <style:style style:name="Tabla1.1" style:family="table-row">
      <style:table-row-properties fo:background-color="#fcfdfe">
        <style:background-image/>
      </style:table-row-properties>
    </style:style>
    <style:style style:name="Tabla1.A1" style:family="table-cell">
      <style:table-cell-properties style:vertical-align="middle" fo:background-color="#c3dcf7" fo:padding="0.049cm" fo:border="0.5pt solid #d4e0ee">
        <style:background-image/>
      </style:table-cell-properties>
    </style:style>
    <style:style style:name="Tabla1.A2" style:family="table-cell">
      <style:table-cell-properties style:vertical-align="middle" fo:padding="0.049cm" fo:border="0.5pt solid #d4e0ee"/>
    </style:style>
    <style:style style:name="Tabla2" style:family="table">
      <style:table-properties style:width="17cm" table:align="left"/>
    </style:style>
    <style:style style:name="Tabla2.A" style:family="table-column">
      <style:table-column-properties style:column-width="17cm"/>
    </style:style>
    <style:style style:name="Tabla2.1" style:family="table-row">
      <style:table-row-properties fo:background-color="#fcfdfe">
        <style:background-image/>
      </style:table-row-properties>
    </style:style>
    <style:style style:name="Tabla2.A1" style:family="table-cell">
      <style:table-cell-properties style:vertical-align="middle" fo:background-color="#c3dcf7" fo:padding="0.049cm" fo:border="0.5pt solid #d4e0ee">
        <style:background-image/>
      </style:table-cell-properties>
    </style:style>
    <style:style style:name="Tabla2.A2" style:family="table-cell">
      <style:table-cell-properties style:vertical-align="middle" fo:padding="0.049cm" fo:border="0.5pt solid #d4e0ee"/>
    </style:style>
    <style:style style:name="Tabla3" style:family="table">
      <style:table-properties style:width="17cm" table:align="left"/>
    </style:style>
    <style:style style:name="Tabla3.A" style:family="table-column">
      <style:table-column-properties style:column-width="17cm"/>
    </style:style>
    <style:style style:name="Tabla3.1" style:family="table-row">
      <style:table-row-properties fo:background-color="#fcfdfe">
        <style:background-image/>
      </style:table-row-properties>
    </style:style>
    <style:style style:name="Tabla3.A1" style:family="table-cell">
      <style:table-cell-properties style:vertical-align="middle" fo:background-color="#c3dcf7" fo:padding="0.049cm" fo:border="0.5pt solid #d4e0ee">
        <style:background-image/>
      </style:table-cell-properties>
    </style:style>
    <style:style style:name="Tabla3.A2" style:family="table-cell">
      <style:table-cell-properties style:vertical-align="middle" fo:padding="0.049cm" fo:border="0.5pt solid #d4e0ee"/>
    </style:style>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Table_20_Heading">
      <style:paragraph-properties fo:margin-left="0cm" fo:margin-right="0cm" fo:margin-top="0cm" fo:margin-bottom="0cm" style:contextual-spacing="false" fo:text-align="center" style:justify-single-word="false" fo:text-indent="0cm" style:auto-text-indent="false"/>
    </style:style>
    <style:style style:name="P3" style:family="paragraph" style:parent-style-name="Table_20_Contents">
      <style:paragraph-properties fo:margin-left="0cm" fo:margin-right="0cm" fo:margin-top="0cm" fo:margin-bottom="0cm" style:contextual-spacing="false" fo:text-indent="0cm" style:auto-text-indent="false"/>
      <style:text-properties fo:color="#555555" loext:opacity="100%" style:font-name="HelveticaNeue-Light"/>
    </style:style>
    <style:style style:name="P4" style:family="paragraph" style:parent-style-name="Table_20_Contents">
      <style:paragraph-properties fo:margin-left="0cm" fo:margin-right="0cm" fo:margin-top="0cm" fo:margin-bottom="0cm" style:contextual-spacing="false" fo:text-indent="0cm" style:auto-text-indent="false"/>
      <style:text-properties fo:color="#555555" loext:opacity="100%"/>
    </style:style>
    <style:style style:name="P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HelveticaNeue-Light" fo:font-size="12pt" fo:letter-spacing="normal" fo:font-style="normal" fo:font-weight="normal" style:font-name-asian="HelveticaNeue-Light" style:font-size-asian="12pt" style:font-style-asian="normal" style:font-weight-asian="normal" style:font-name-complex="HelveticaNeue-Light" style:font-size-complex="12pt" style:font-style-complex="normal" style:font-weight-complex="normal" loext:padding="0cm" loext:border="none"/>
    </style:style>
    <style:style style:name="P6" style:family="paragraph" style:parent-style-name="Standard">
      <style:paragraph-properties fo:margin-left="0cm" fo:margin-right="0cm" fo:text-indent="0cm" style:auto-text-indent="false"/>
    </style:style>
    <style:style style:name="P7" style:family="paragraph" style:parent-style-name="Table_20_Contents">
      <style:paragraph-properties fo:margin-top="0cm" fo:margin-bottom="0.499cm" style:contextual-spacing="false"/>
    </style:style>
    <style:style style:name="P8" style:family="paragraph" style:parent-style-name="Table_20_Contents">
      <style:paragraph-properties fo:margin-left="0cm" fo:margin-right="0cm" fo:margin-top="0cm" fo:margin-bottom="0.499cm" style:contextual-spacing="false" fo:text-indent="0cm" style:auto-text-indent="false"/>
      <style:text-properties fo:font-size="9pt"/>
    </style:style>
    <style:style style:name="P9" style:family="paragraph" style:parent-style-name="Table_20_Contents" style:list-style-name="L1">
      <style:paragraph-properties fo:margin-left="0cm" fo:margin-right="0cm" fo:margin-top="0cm" fo:margin-bottom="0.499cm" style:contextual-spacing="false" fo:text-indent="0cm" style:auto-text-indent="false"/>
    </style:style>
    <style:style style:name="P10" style:family="paragraph" style:parent-style-name="Table_20_Contents" style:list-style-name="L2">
      <style:paragraph-properties fo:margin-left="0cm" fo:margin-right="0cm" fo:margin-top="0cm" fo:margin-bottom="0.499cm" style:contextual-spacing="false" fo:text-indent="0cm" style:auto-text-indent="false"/>
    </style:style>
    <style:style style:name="P11" style:family="paragraph" style:parent-style-name="Table_20_Contents" style:list-style-name="L3">
      <style:paragraph-properties fo:margin-left="0cm" fo:margin-right="0cm" fo:margin-top="0cm" fo:margin-bottom="0.499cm" style:contextual-spacing="false" fo:text-indent="0cm" style:auto-text-indent="false"/>
    </style:style>
    <style:style style:name="P12" style:family="paragraph" style:parent-style-name="Table_20_Contents" style:list-style-name="L4">
      <style:paragraph-properties fo:margin-left="0cm" fo:margin-right="0cm" fo:margin-top="0cm" fo:margin-bottom="0.499cm" style:contextual-spacing="false" fo:text-indent="0cm" style:auto-text-indent="false"/>
    </style:style>
    <style:style style:name="P13" style:family="paragraph" style:parent-style-name="Table_20_Contents" style:list-style-name="L5">
      <style:paragraph-properties fo:margin-left="0cm" fo:margin-right="0cm" fo:margin-top="0cm" fo:margin-bottom="0.499cm" style:contextual-spacing="false" fo:text-indent="0cm" style:auto-text-indent="false"/>
    </style:style>
    <style:style style:name="P14" style:family="paragraph" style:parent-style-name="Table_20_Contents">
      <style:paragraph-properties fo:margin-left="0cm" fo:margin-right="0cm" fo:margin-top="0cm" fo:margin-bottom="0.499cm" style:contextual-spacing="false" fo:text-indent="0cm" style:auto-text-indent="false"/>
      <style:text-properties fo:font-size="9pt" fo:font-weight="bold"/>
    </style:style>
    <style:style style:name="P15" style:family="paragraph" style:parent-style-name="Table_20_Contents">
      <style:paragraph-properties fo:margin-left="0cm" fo:margin-right="0cm" fo:margin-top="0cm" fo:margin-bottom="0.499cm" style:contextual-spacing="false" fo:text-indent="0cm" style:auto-text-indent="false"/>
    </style:style>
    <style:style style:name="P1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HelveticaNeue-Light" fo:font-size="12pt" fo:letter-spacing="normal" fo:font-style="normal" fo:font-weight="normal" loext:padding="0cm" loext:border="none"/>
    </style:style>
    <style:style style:name="T1" style:family="text">
      <style:text-properties fo:color="#153152" loext:opacity="100%" style:font-name="HelveticaNeue-Light" fo:font-size="18pt" fo:font-weight="bold"/>
    </style:style>
    <style:style style:name="T2" style:family="text">
      <style:text-properties fo:color="#153152" loext:opacity="100%" style:font-name="HelveticaNeue-Light" fo:font-size="18pt" fo:font-weight="bold" style:font-name-asian="HelveticaNeue-Light" style:font-weight-asian="bold" style:font-name-complex="HelveticaNeue-Light" style:font-weight-complex="bold"/>
    </style:style>
    <style:style style:name="T3" style:family="text">
      <style:text-properties fo:color="#555555" loext:opacity="100%" style:font-name="HelveticaNeue-Light" style:font-name-asian="HelveticaNeue-Light" style:font-name-complex="HelveticaNeue-Light"/>
    </style:style>
    <style:style style:name="T4" style:family="text">
      <style:text-properties fo:color="#555555" loext:opacity="100%" style:font-name="HelveticaNeue-Light"/>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id24">
        <text:section text:style-name="Sect1" text:name="ta24_1">
          <text:p text:style-name="P1">Introducción de la tarea</text:p>
          <table:table table:name="Tabla1" table:style-name="Tabla1">
            <table:table-column table:style-name="Tabla1.A"/>
            <table:table-row table:style-name="Tabla1.1">
              <table:table-cell table:style-name="Tabla1.A1" office:value-type="string">
                <text:p text:style-name="P2"><text:span text:style-name="Strong_20_Emphasis"><text:span text:style-name="T1">CONTEXTO DE LA TAREA</text:span></text:span><text:span text:style-name="T2"/></text:p>
              </table:table-cell>
            </table:table-row>
            <table:table-row table:style-name="Tabla1.1">
              <table:table-cell table:style-name="Tabla1.A2" office:value-type="string">
                <text:p text:style-name="P3">Con esta tarea aprenderemos a evaluar y comparar una serie de ERP's para la elección del mas adecuado para una PYME. Sus requisitos de acceso y funcionalidad. Conoceremos sobre todo qué nos aportan este tipo de aplicaciones.</text:p>
                <text:p text:style-name="P4"> </text:p>
                <text:p text:style-name="P3">Para realizar esta tarea es aconsejable revisar los contenidos de las Unidad 7.<text:span text:style-name="T3"/></text:p>
              </table:table-cell>
            </table:table-row>
          </table:table>
          <text:p text:style-name="P5"/>
        </text:section>
      </text:section>
      <text:section text:style-name="Sect1" text:name="id25">
        <text:p text:style-name="P6"/>
        <text:section text:style-name="Sect1" text:name="ta25_1">
          <text:p text:style-name="P1">¿Qué debes hacer?</text:p>
          <table:table table:name="Tabla2" table:style-name="Tabla2">
            <table:table-column table:style-name="Tabla2.A"/>
            <table:table-row table:style-name="Tabla2.1">
              <table:table-cell table:style-name="Tabla2.A1" office:value-type="string">
                <text:p text:style-name="P2"><text:span text:style-name="Strong_20_Emphasis"><text:span text:style-name="T1">ENUNCIADO DE LA TAREA</text:span></text:span><text:span text:style-name="T2"/></text:p>
              </table:table-cell>
            </table:table-row>
            <table:table-row table:style-name="Tabla2.1">
              <table:table-cell table:style-name="Tabla2.A2" office:value-type="string">
                <text:p text:style-name="P7"/>
                <text:p text:style-name="P3">Esta tarea consiste en realizar las siguientes subtareas:</text:p>
                <text:p text:style-name="P8"/>
                <text:list text:style-name="L1">
                  <text:list-item>
                    <text:p text:style-name="P9"><text:span text:style-name="Strong_20_Emphasis"><text:span text:style-name="T4">RA07_b) Se han evaluado las características de las principales aplicaciones de gestión empresarial.</text:span></text:span></text:p>
                  </text:list-item>
                </text:list>
                <text:p text:style-name="P3">Indica las características que debe reunir una aplicación de gestión para poder ser considerada como ERP..Detalla las ventajas que nos aporta una aplicación de este tipo. </text:p>
                <text:list text:style-name="L2">
                  <text:list-item>
                    <text:p text:style-name="P10"><text:span text:style-name="Strong_20_Emphasis"><text:span text:style-name="T4">RA07_d) Se han configurado y adaptado las aplicaciones.</text:span></text:span></text:p>
                  </text:list-item>
                </text:list>
                <text:p text:style-name="P3">A partir de los manuales y ayudas que se ofrecen en la unidad detalla los pasos seguidos para realizar la instalación del ERP. Se pueden usar capturas de las que se aportan en estos manuales para mostrar el proceso de instalación.</text:p>
                <text:p text:style-name="P8"/>
                <text:p text:style-name="P3">Indica como realizar la personalización del ERP. Se pueden usar capturas de los manuales o de la propia aplicación.</text:p>
                <text:list text:style-name="L3">
                  <text:list-item>
                    <text:p text:style-name="P11"><text:span text:style-name="Strong_20_Emphasis"><text:span text:style-name="T4">RA07_e) Se ha establecido y verificado el acceso seguro a la información.</text:span></text:span></text:p>
                  </text:list-item>
                </text:list>
                <text:p text:style-name="P3">Explica el sistema de seguridad que usa Dynamics 365 BC</text:p>
                <text:list text:style-name="L4">
                  <text:list-item>
                    <text:p text:style-name="P12"><text:span text:style-name="Strong_20_Emphasis"><text:span text:style-name="T4">RA07_f) Se han generado informes.</text:span></text:span></text:p>
                  </text:list-item>
                </text:list>
                <text:p text:style-name="P3">Indica qué pasos debes seguir para mostrar un informe de clientes en el ERP.</text:p>
                <text:list text:style-name="L5">
                  <text:list-item>
                    <text:p text:style-name="P13"><text:span text:style-name="Strong_20_Emphasis"><text:span text:style-name="T4">RA07_g) Se han realizado tareas de integración con aplicaciones ofimáticas.</text:span></text:span></text:p>
                  </text:list-item>
                </text:list>
                <text:p text:style-name="P3">Indica qué pasos seguir para obtener por ejemplo, los datos de clientes en formato EXCEL.</text:p>
                <text:p text:style-name="P14"/>
                <text:p text:style-name="P3">Cada uno de los puntos requeridos deben ser adjuntados en el informe de la tarea. Se usaran tanto explicaciones como capturas que expliquen del modo más claro posible cada una de las peticiones que componen esta tarea.</text:p>
                <text:p text:style-name="P15"/>
                <text:p text:style-name="P3">Se pueden usar tanto los materiales incluidos en esta unidad, capturas obtenidas de las sesiones online y la documentación que se subirá en cada sesión, como capturas <text:soft-page-break/>obtenidas directamente de la aplicación que se ofrece instalada en una máquina virtual.</text:p>
                <text:p text:style-name="P15"/>
                <text:p text:style-name="P3">La instalación de esta máquina no es obligatoria para la realización de este tema, solo la instalarán aquellos alumnos que cuenten con el sistema que se requiere y que a su ver lo deseen.</text:p>
                <text:p text:style-name="P4"> <text:span text:style-name="T3"/></text:p>
              </table:table-cell>
            </table:table-row>
          </table:table>
          <text:p text:style-name="P16">...</text:p>
          <text:p text:style-name="P16">...</text:p>
        </text:section>
      </text:section>
      <text:section text:style-name="Sect1" text:name="id26">
        <text:p text:style-name="P6"/>
        <text:section text:style-name="Sect1" text:name="ta26_1">
          <text:p text:style-name="P1">¿Qué debes tener en cuenta para resolver la tarea?</text:p>
          <table:table table:name="Tabla3" table:style-name="Tabla3">
            <table:table-column table:style-name="Tabla3.A"/>
            <table:table-row table:style-name="Tabla3.1">
              <table:table-cell table:style-name="Tabla3.A1" office:value-type="string">
                <text:p text:style-name="P2"><text:span text:style-name="Strong_20_Emphasis"><text:span text:style-name="T1">CONSEJOS Y RECOMENDACIONES PARA REALIZAR LA TAREA.</text:span></text:span><text:span text:style-name="T2"/></text:p>
              </table:table-cell>
            </table:table-row>
            <table:table-row table:style-name="Tabla3.1">
              <table:table-cell table:style-name="Tabla3.A2" office:value-type="string">
                <text:p text:style-name="P3">Para realizar esta tarea tener en cuenta las siguientes recomendaciones:</text:p>
                <text:p text:style-name="P3">1- Revisar los manuales y materiales que se proporcionan en la unidad.</text:p>
                <text:p text:style-name="P3">2 -Investigar sobre funcionalidades de estas aplicaciones usando diversas fuentes.</text:p>
                <text:p text:style-name="P3">3 -Analizar las características más importantes de Microsoft Dynamics Nav.</text:p>
                <text:p text:style-name="P3">4- Elaborar el informe apoyándose en documentación de la unidad, material adjunto y las sesiones ONLINE y material de esas sesiones.<text:span text:style-name="T3"/></text:p>
              </table:table-cell>
            </table:table-row>
          </table:table>
          <text:p text:style-name="P5"/>
        </text:section>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5T10:44:26.139731100</meta:creation-date>
    <dc:date>2026-06-15T10:45:02.238535400</dc:date>
    <meta:editing-duration>PT36S</meta:editing-duration>
    <meta:editing-cycles>1</meta:editing-cycles>
    <meta:document-statistic meta:table-count="3" meta:image-count="0" meta:object-count="0" meta:page-count="2" meta:paragraph-count="32" meta:word-count="443" meta:character-count="2715" meta:non-whitespace-character-count="2304"/>
    <meta:generator>LibreOffice/26.2.3.2$Windows_X86_64 LibreOffice_project/70e089b17412e4cb7773e41413306b17a2328c34</meta:generator>
  </office:meta>
</office:document-meta>
</file>