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fo:background-color="#fcfdfe">
        <style:background-image/>
      </style:table-row-properties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3.2" style:family="table-row">
      <style:table-row-properties fo:background-color="#c3dcf7">
        <style:background-image/>
      </style:table-row-properties>
    </style:style>
    <style:style style:name="Tabla3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555555" loext:opacity="10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instalar y usar algunas aplicaciones de propósito general y utilidades para el sistema operativo.<text:span text:style-name="T3"/></text:p>
              </table:table-cell>
            </table:table-row>
          </table:table>
          <text:p text:style-name="P4"/>
        </text:section>
      </text:section>
      <text:section text:style-name="Sect1" text:name="id25">
        <text:p text:style-name="P5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Para realizar esta tarea usaremos un ordenador con Windows 10 instalado, podemos usar Virtual Box con un sistema operativo Windows 10 o un ordenador real.</text:p>
                <text:p text:style-name="P3">Se requieren diversas aplicaciones para realizar esta tarea, que se descargaran de los sitios oficiales y se instalaran debidamente en el sistema operativo.</text:p>
                <text:p text:style-name="P6"> </text:p>
                <text:p text:style-name="P3">Se llevarán a cabo los siguientes apartados:</text:p>
                <text:p text:style-name="P7"><text:span text:style-name="Strong_20_Emphasis"><text:span text:style-name="T4"><text:line-break/>RA02_c Se ha instalado y evaluado software ofimático y de utilidad general</text:span></text:span></text:p>
                <text:p text:style-name="P3">Un programa de tratamiento de texto o un procesador de texto, no solo permite escribir e imprimir un documento, sino, además, almacenar y modificar el texto tantas veces como se desee, manejar diferentes tipos de letra, combinaciones en diferentes tamaños y colores, aplicar formatos para el documento, corrección de ortografía y sintaxis, inclusión de imágenes, etc.</text:p>
                <text:p text:style-name="P7"><text:span text:style-name="T4">Incluya una captura de pantalla del </text:span><text:span text:style-name="Strong_20_Emphasis"><text:span text:style-name="T4">procesador de textos</text:span></text:span><text:span text:style-name="T4"> con el que está realizando esta tarea.</text:span></text:p>
                <text:p text:style-name="P3">Use el buscador Google para acceder a información sobre la instalación del antivirus Avast, esta información debe de estar en idioma español.</text:p>
                <text:p text:style-name="P7"><text:span text:style-name="T4">Es requisito obligatorio para realizar correctamente este apartado usar la </text:span><text:span text:style-name="Strong_20_Emphasis"><text:span text:style-name="T4">búsqueda avanzada</text:span></text:span><text:span text:style-name="T4"> de Google. Dentro de la búsqueda avanzada, en la parte “limitar los resultados por…” deberá buscar información sobre la instalación de Avast en la página oficial (sitio o dominio) “Avast.com” y en idioma español.</text:span></text:p>
                <text:p text:style-name="P3">Realice capturas de pantalla y comentarios de la búsqueda avanzada y del resultado obtenido.</text:p>
                <text:p text:style-name="P6"> </text:p>
                <text:p text:style-name="P7"><text:span text:style-name="Strong_20_Emphasis"><text:span text:style-name="T4"><text:line-break/>RA02_d Se han instalado y evaluado utilidades para la gestión de archivos, recuperación de datos, mantenimiento y optimización del sistema.</text:span></text:span></text:p>
                <text:p text:style-name="P7"><text:span text:style-name="T4">En un sistema operativo Windows 10, instalar y utilizar la aplicación </text:span><text:span text:style-name="Strong_20_Emphasis"><text:span text:style-name="T4">Defraggler</text:span></text:span><text:span text:style-name="T4"> versión gratuita, de Piriform, y </text:span><text:span text:style-name="Strong_20_Emphasis"><text:span text:style-name="T4">analizar la unidad C</text:span></text:span><text:span text:style-name="T4"> donde está instalado el sistema operativo.</text:span></text:p>
                <text:p text:style-name="P3">Incluir en el informe de la tarea una captura que muestre el resultado del análisis de la unidad, donde se nos indique el estado de fragmentación de dicha unidad.</text:p>
                <text:p text:style-name="P7"><text:span text:style-name="T4">Podemos seguir trabajando en el mismo sistema operativo, esta vez vamos a usar el software de sincronización de archivos </text:span><text:span text:style-name="Strong_20_Emphasis"><text:span text:style-name="T4">SyncFolders</text:span></text:span><text:span text:style-name="T4">.</text:span></text:p>
                <text:p text:style-name="P3">Crear dos carpetas, una llamada "Origen_XXX" y otra llamada "Destino_XXX", donde XXX serán las iniciales del alumno.</text:p>
                <text:p text:style-name="P3">Copiar datos dentro de la carpeta "Origen_XXX".</text:p>
                <text:p text:style-name="P7"><text:span text:style-name="T4">Usar debidamente el programa SyncFolders para </text:span><text:span text:style-name="Strong_20_Emphasis"><text:span text:style-name="T4">mantener sincronizadas las dos carpetas</text:span></text:span><text:span text:style-name="T4"> de forma que los archivos nuevos y actualizados se copien de Izquierda (Origen) a Derecha (Destino) y viceversa.</text:span></text:p>
                <text:p text:style-name="P3">Especificar claramente en el informe de la tarea la opción de sincronización que se ha elegido.</text:p>
                <text:p text:style-name="P3"><text:soft-page-break/>Realizar la sincronización de las dos carpetas y mostrar una captura del resultado de dicha sincronización.</text:p>
                <text:p text:style-name="P6"> </text:p>
                <text:p text:style-name="P7"><text:span text:style-name="Strong_20_Emphasis"><text:span text:style-name="T4"><text:line-break/>RA02_e Se han instalado y evaluado utilidades de seguridad básica.</text:span></text:span></text:p>
                <text:p text:style-name="P7"><text:span text:style-name="T4">Se instalará un software antivirus. En concreto el antivirus </text:span><text:span text:style-name="Strong_20_Emphasis"><text:span text:style-name="T4">Avast</text:span></text:span><text:span text:style-name="T4"> en su versión gratuita. Descargaremos está aplicación para Windows y la instalaremos en el sistema operativo Windows 10.</text:span></text:p>
                <text:p text:style-name="P3">Deberá crear una carpeta y nombrarla como “DatosXXX” donde XXX serán sus iniciales.</text:p>
                <text:p text:style-name="P7"><text:span text:style-name="T4">Realice un</text:span><text:span text:style-name="Strong_20_Emphasis"><text:span text:style-name="T4"> chequeo o análisis</text:span></text:span><text:span text:style-name="T4"> de virus con la versión de Avast que acaba de instalar, sobre la carpeta “DatosXXX”.</text:span></text:p>
                <text:p text:style-name="P6"> </text:p>
                <text:p text:style-name="P7"><text:span text:style-name="Strong_20_Emphasis"><text:span text:style-name="T4"><text:line-break/>RA02_h Se han probado y comparado aplicaciones portables y no portables.</text:span></text:span></text:p>
                <text:p text:style-name="P7"><text:span text:style-name="T4">Cuando ya no necesitamos una aplicación, lo recomendable es desinstalar dicho software de nuestro sistema operativo. En caso de tratarse de una aplicación </text:span><text:span text:style-name="Strong_20_Emphasis"><text:span text:style-name="T4">portable</text:span></text:span><text:span text:style-name="T4"> que tendremos que hacer para "desinstalar" este tipo de aplicaciones y conseguir así que ya no estén en nuestro sistema.</text:span></text:p>
                <text:p text:style-name="P6"> </text:p>
                <text:p text:style-name="P3"><text:line-break/><text:line-break/>Documente todos estos procesos realizados en los distintos apartados con comentarios breves y significativos de las acciones realizadas y de las capturas de imagen necesarias para demostrar que se han realizado los pasos correctamente y los resultados obtenidos son los requeridos.</text:p>
                <text:p text:style-name="P7"><text:span text:style-name="T5"> </text:span><text:span text:style-name="Emphasis"><text:span text:style-name="Strong_20_Emphasis"><text:span text:style-name="T5"> </text:span></text:span></text:span></text:p>
              </table:table-cell>
            </table:table-row>
          </table:table>
          <text:p text:style-name="P4"/>
        </text:section>
      </text:section>
      <text:section text:style-name="Sect1" text:name="id26">
        <text:p text:style-name="P5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 table:style-name="Tabla3.1">
              <table:table-cell table:style-name="Tabla3.A1" office:value-type="string">
                <text:p text:style-name="P2"><text:span text:style-name="Strong_20_Emphasis"><text:span text:style-name="T1">CONSEJOS Y RECOMENDACIONES PARA REALIZAR LA TAREA.</text:span></text:span><text:span text:style-name="T2"/></text:p>
              </table:table-cell>
            </table:table-row>
            <table:table-row table:style-name="Tabla3.2">
              <table:table-cell table:style-name="Tabla3.A2" office:value-type="string">
                <text:p text:style-name="P3">Para realizar esta tarea es aconsejable seguir los siguientes pasos:</text:p>
                <text:p text:style-name="P3">Para la resolución de la primera parte del apartado RA02_c sería de ayuda consultar el epígrafe “Software de propósito general”.</text:p>
                <text:p text:style-name="P3">Para la resolución de la segunda parte del apartado RA02_c es aconsejable revisar los ejercicios resueltos sobre búsqueda avanzada en Google.</text:p>
                <text:p text:style-name="P3"><text:line-break/>Para la instalación del software Defraggler puede ser de utilidad revisar el epígrafe "Utilidades para Gestión de discos. Fragmentación y particionado" del anexo Instalación y uso de algunas utilidades.</text:p>
                <text:p text:style-name="P3"><text:line-break/>Para la instalación del software SyncFolders puede ser de utilidad revisar el epígrafe " Utilidades para Gestión de ficheros y recuperación de datos " del anexo Instalación y uso de algunas utilidades.</text:p>
                <text:p text:style-name="P3"><text:line-break/>Para la instalación de un antivirus Avast consulte el ejercicio resuelto “Instalación de un antivirus gratuito. Avast”, así como el epígrafe "Utilidades Antivirus, anti espías y cortafuegos" del anexo Instalación y uso de algunas utilidades.</text:p>
                <text:p text:style-name="P3"><text:line-break/>Para resolver el apartado RA02_h puede consultar el epígrafe "Desinstalación de <text:soft-page-break/>aplicaciones. Utilidades" de la unidad.<text:span text:style-name="T3"/></text:p>
              </table:table-cell>
            </table:table-row>
          </table:table>
          <text:p text:style-name="P4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10:20:05.729481600</meta:creation-date>
    <dc:date>2026-06-15T10:20:57.976675000</dc:date>
    <meta:editing-duration>PT52S</meta:editing-duration>
    <meta:editing-cycles>1</meta:editing-cycles>
    <meta:document-statistic meta:table-count="3" meta:image-count="0" meta:object-count="0" meta:page-count="3" meta:paragraph-count="45" meta:word-count="782" meta:character-count="5115" meta:non-whitespace-character-count="4355"/>
    <meta:generator>LibreOffice/26.2.3.2$Windows_X86_64 LibreOffice_project/70e089b17412e4cb7773e41413306b17a2328c34</meta:generator>
  </office:meta>
</office:document-meta>
</file>