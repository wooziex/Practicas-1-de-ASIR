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2" style:family="table-row">
      <style:table-row-properties fo:background-color="#c3dcf7">
        <style:background-image/>
      </style:table-row-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font-name="HelveticaNeue-Light"/>
    </style:style>
    <style:style style:name="T5" style:family="text">
      <style:text-properties fo:color="#365f91" loext:opacity="100%" fo:font-family="Arial" fo:font-size="12pt" fo:font-weight="bold"/>
    </style:style>
    <style:style style:name="T6" style:family="text">
      <style:text-properties fo:color="#365f91" loext:opacity="100%" style:font-name="HelveticaNeue-Light"/>
    </style:style>
    <style:style style:name="T7" style:family="text">
      <style:text-properties fo:color="#555555" loext:opacity="1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En esta tarea se repasan conceptos para realizar particionado y formateado de discos, así como creación y restauración de una imagen de un sistema informático, ayudándonos para esto último del software Clonezilla Live.<text:span text:style-name="T3"/></text:p>
              </table:table-cell>
            </table:table-row>
          </table:table>
          <text:p text:style-name="P4"/>
        </text:section>
      </text:section>
      <text:section text:style-name="Sect1" text:name="id25">
        <text:p text:style-name="P5"/>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3">Para realizar esta tarea usaremos una máquina virtual con Ubuntu ya instalado.</text:p>
                <text:p text:style-name="P6"><text:span text:style-name="T4">Agregaremos a esta máquina virtual un nuevo disco duro de 15 GB aproximadamente. De aquí en adelante, para facilitar la comprensión del enunciado, cuando me refiera a este disco de 15 GB, lo haré como “</text:span><text:span text:style-name="Strong_20_Emphasis"><text:span text:style-name="T5">disco destino</text:span></text:span><text:span text:style-name="T4">”.</text:span></text:p>
                <text:p text:style-name="P3">La máquina virtual tendrá por tanto dos discos duros, en el primero (sda) está el sistema operativo y el segundo (sdb) será el disco destino de 15 GB.</text:p>
                <text:p text:style-name="P3">No hay que mostrar en el informe de la tarea el proceso realizado hasta aquí.</text:p>
                <text:p text:style-name="P7"> </text:p>
                <text:p text:style-name="P3">Se iniciará la máquina virtual con Ubuntu y se realizarán los siguientes apartados:</text:p>
                <text:p text:style-name="P7"> </text:p>
                <text:p text:style-name="P6"><text:span text:style-name="Strong_20_Emphasis"><text:span text:style-name="T4">RA03_d) Se han utilizado herramientas para el particionado de discos.</text:span></text:span></text:p>
                <text:p text:style-name="P6"><text:span text:style-name="T4">Se debe de particionar con una sola partición primaria que ocupe todo el disco (el </text:span><text:span text:style-name="Strong_20_Emphasis"><text:span text:style-name="T5">disco destino),</text:span></text:span><text:span text:style-name="T4"> se debe de formatear dicha partición con sistema de ficheros EXT4. El disco quedará accesible para poder seguir trabajando con él y posteriormente alojar en él una copia de seguridad que realizaremos con un software de creación de imágenes.</text:span></text:p>
                <text:p text:style-name="P3">Para realizar las operaciones de particionar y formatear el disco se usará cualquier método, herramienta o software, visto en cualquiera de los recursos del temario.</text:p>
                <text:p text:style-name="P6"><text:span text:style-name="T4">Posteriormente el alumno debe de crear un </text:span><text:span text:style-name="Strong_20_Emphasis"><text:span text:style-name="T5">directorio </text:span></text:span><text:span text:style-name="T4">llamado</text:span><text:span text:style-name="Strong_20_Emphasis"><text:span text:style-name="T6"> </text:span></text:span><text:span text:style-name="Strong_20_Emphasis"><text:span text:style-name="T5">/XXXNNNNNN</text:span></text:span><text:span text:style-name="T4">, en el disco destino y mostrar que dicho directorio se ha creado correctamente. (XXX serán las iniciales del alumno, y NNNNNN será el DNI del alumno.</text:span></text:p>
                <text:p text:style-name="P7"> </text:p>
                <text:p text:style-name="P6"><text:span text:style-name="Strong_20_Emphasis"><text:span text:style-name="T4">RA03_e) Se han empleado distintas utilidades y soportes para realizar imágenes.</text:span></text:span></text:p>
                <text:p text:style-name="P3">Seguiremos trabajando con la misma máquina virtual Ubuntu del apartado anterior.</text:p>
                <text:p text:style-name="P3">Usaremos en este apartado el software Clonezilla live, para realizar una imagen o copia de seguridad de la partición donde está instalado el sistema operativo Ubuntu.</text:p>
                <text:p text:style-name="P6"><text:span text:style-name="T4">Se debe realizar con Clonezilla live una </text:span><text:span text:style-name="Strong_20_Emphasis"><text:span text:style-name="T5">imagen de la partición</text:span></text:span><text:span text:style-name="T4"> donde está instalado Ubuntu. El destino de la imagen o copia de seguridad será el directorio (/XXXNNNNNN) creado en la partición primaria del disco destino.<text:line-break/><text:line-break/>No se trata de una clonación de disco, no es una copia de disco a disco, ni una imagen del disco. Se pide realizar una imagen de la partición, ¡atención a este detalle!.</text:span></text:p>
                <text:p text:style-name="P3">Una vez finalizada la copia de seguridad, habrá que iniciar de nuevo el sistema operativo y mostrar la imagen generada y almacenada por Clonezilla live, en el disco destino, muestre todos los ficheros que se han creado en el directorio de la imagen.</text:p>
                <text:p text:style-name="P6"><text:span text:style-name="Strong_20_Emphasis"><text:span text:style-name="T4"><text:line-break/><text:line-break/>RA03_f) Se han restaurado imágenes desde distintas ubicaciones.</text:span></text:span></text:p>
                <text:p text:style-name="P6"><text:span text:style-name="T4">Usando de nuevo el software Clonezilla live, </text:span><text:span text:style-name="Strong_20_Emphasis"><text:span text:style-name="T5">realice una restauración de la imagen creada en el apartado anterior</text:span></text:span><text:span text:style-name="T4">.</text:span></text:p>
                <text:p text:style-name="P3">La imagen o copia de seguridad (que se encuentra almacenada en el disco destino) debe <text:soft-page-break/>restaurarse en el disco y partición donde se encuentra instalado el sistema operativo Ubuntu, simulando así que hemos recuperado el sistema operativo de una posible pérdida o desastre.</text:p>
                <text:p text:style-name="P7"> </text:p>
                <text:p text:style-name="P3"><text:line-break/><text:line-break/>Incluya en el informe de la tarea las capturas y comentarios que se crean necesarios para demostrar que se han realizado estas acciones.</text:p>
                <text:p text:style-name="P7"> </text:p>
                <text:p text:style-name="P7"> </text:p>
                <text:p text:style-name="P6"><text:span text:style-name="T7"> </text:span><text:span text:style-name="Emphasis"><text:span text:style-name="Strong_20_Emphasis"><text:span text:style-name="T7"> </text:span></text:span></text:span></text:p>
              </table:table-cell>
            </table:table-row>
          </table:table>
          <text:p text:style-name="P4"/>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2">
              <table:table-cell table:style-name="Tabla3.A2" office:value-type="string">
                <text:p text:style-name="P3">Para realizar esta tarea es aconsejable seguir los siguientes pasos:</text:p>
                <text:p text:style-name="P3">En el apartado RA03_d), para particionar y formatear el disco se puede consultar el epígrafe “Particionado de discos. Casos prácticos” de la unidad 03. Puede también revisar los ejercicios resueltos "Usar Administración de discos en Windows", "Descargar Gparted Live", "Usar Gparted Live en una máquina virtual".</text:p>
                <text:p text:style-name="P3">También puede serle de ayuda para realizar el formateo del disco consultar el ejercicio resuelto “Administrar un disco en Ubuntu”, donde se efectúa una operación similar en un entorno de Ubuntu.</text:p>
                <text:p text:style-name="P3">Si lo desea puede usar para gestionar este disco el comando “fdisk” de Linux, explicado en el epígrafe “Particionado de discos. Casos prácticos” de la unidad 03, o cualquier herramienta o software de particiones visto en el temario.</text:p>
                <text:p text:style-name="P3">Para realizar el apartado RA03_e) y realizar una copia de seguridad con Clonezilla, puede ser de gran ayuda revisar los ejercicios resueltos “Obtener Clonezilla”, “uso de Clonezilla” y "Realizar una copia de seguridad con Clonezilla" de la unidad 03.</text:p>
                <text:p text:style-name="P3">En el apartado RA03_f) para restaurar la imagen puede ayudar la consulta del ejercicio resuelto “Restaurar una copia de seguridad Clonezilla” de la unidad 03.<text:span text:style-name="T3"/></text:p>
              </table:table-cell>
            </table:table-row>
          </table:table>
          <text:p text:style-name="P4"/>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21:13.441547800</meta:creation-date>
    <dc:date>2026-06-15T10:21:32.500769000</dc:date>
    <meta:editing-duration>PT19S</meta:editing-duration>
    <meta:editing-cycles>1</meta:editing-cycles>
    <meta:document-statistic meta:table-count="3" meta:image-count="0" meta:object-count="0" meta:page-count="2" meta:paragraph-count="38" meta:word-count="737" meta:character-count="4573" meta:non-whitespace-character-count="3854"/>
    <meta:generator>LibreOffice/26.2.3.2$Windows_X86_64 LibreOffice_project/70e089b17412e4cb7773e41413306b17a2328c34</meta:generator>
  </office:meta>
</office:document-meta>
</file>