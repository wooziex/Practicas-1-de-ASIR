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7cm" table:align="left"/>
    </style:style>
    <style:style style:name="Tabla2.A" style:family="table-column">
      <style:table-column-properties style:column-width="17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0.049cm" fo:border="0.5pt solid #d4e0ee"/>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fcfdfe">
        <style:background-image/>
      </style:table-row-properties>
    </style:style>
    <style:style style:name="Tabla3.A1" style:family="table-cell">
      <style:table-cell-properties style:vertical-align="middle" fo:background-color="#c3dcf7" fo:padding="0.049cm" fo:border="0.5pt solid #d4e0ee">
        <style:background-image/>
      </style:table-cell-properties>
    </style:style>
    <style:style style:name="Tabla3.A2"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5" style:family="paragraph" style:parent-style-name="Standard">
      <style:paragraph-properties fo:margin-left="0cm" fo:margin-right="0cm" fo:text-indent="0cm" style:auto-text-indent="false"/>
    </style:style>
    <style:style style:name="P6" style:family="paragraph" style:parent-style-name="Table_20_Contents">
      <style:paragraph-properties fo:margin-left="0cm" fo:margin-right="0cm" fo:margin-top="0cm" fo:margin-bottom="0cm" style:contextual-spacing="false" fo:text-indent="0cm" style:auto-text-indent="false"/>
    </style:style>
    <style:style style:name="P7"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color="#555555" loext:opacity="100%" style:font-name="HelveticaNeue-Light"/>
    </style:style>
    <style:style style:name="T5" style:family="text">
      <style:text-properties fo:color="#555555" loext:opacity="10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Con esta tarea nos situaremos en un entorno de un centro de proceso de datos, donde vamos a encontrar software y hardware bastante específico con respecto a otros escenarios.</text:p>
                <text:p text:style-name="P3">Una de las facetas más importantes de un CPD es la buena organización de los datos. Es fundamental tener una buena política y gestión de los datos importantes de la empresa.</text:p>
                <text:p text:style-name="P3">En este sentido, la creación y administración de RAID para gestionar los datos de trabajo de la empresa es una muy buena solución, ya que puede cubrir aspectos como la seguridad de los datos y la velocidad de acceso al medio. <text:span text:style-name="T3"/></text:p>
              </table:table-cell>
            </table:table-row>
          </table:table>
          <text:p text:style-name="P4"/>
        </text:section>
      </text:section>
      <text:section text:style-name="Sect1" text:name="id25">
        <text:p text:style-name="P5"/>
        <text:section text:style-name="Sect1" text:name="ta25_1">
          <text:p text:style-name="P1">¿Qué debes hacer?</text:p>
          <table:table table:name="Tabla2" table:style-name="Tabla2">
            <table:table-column table:style-name="Tabla2.A"/>
            <table:table-row table:style-name="Tabla2.1">
              <table:table-cell table:style-name="Tabla2.A1" office:value-type="string">
                <text:p text:style-name="P2"><text:span text:style-name="Strong_20_Emphasis"><text:span text:style-name="T1">ENUNCIADO DE LA TAREA</text:span></text:span><text:span text:style-name="T2"/></text:p>
              </table:table-cell>
            </table:table-row>
            <table:table-row table:style-name="Tabla2.1">
              <table:table-cell table:style-name="Tabla2.A2" office:value-type="string">
                <text:p text:style-name="P3">Para realizar la tarea, trabaje y resuelva los siguientes apartados:<text:line-break/></text:p>
                <text:p text:style-name="P6"><text:span text:style-name="Strong_20_Emphasis"><text:span text:style-name="T4">RA04_e) Se han implantado sistemas de alimentación ininterrumpida y estabilizadores de tensión</text:span></text:span></text:p>
                <text:p text:style-name="P3"><text:line-break/>Indica como se denomina al hardware que se encarga de mejorar la calidad de la energía eléctrica que llega a los elementos de nuestro sistema informático, filtrando subidas y bajadas de tensión, eliminando armónicos de la red eléctrica y solucionando cortes de energía.</text:p>
                <text:p text:style-name="P3">Incluye un enlace web donde podamos obtener información o comprar uno de estos aparatos.</text:p>
                <text:p text:style-name="P7"> </text:p>
                <text:p text:style-name="P6"><text:span text:style-name="Strong_20_Emphasis"><text:span text:style-name="T4">RA04_f) Se han manipulado correctamente dispositivos hardware para almacenamiento y alimentación con conexión en caliente.</text:span></text:span></text:p>
                <text:p text:style-name="P3"><text:line-break/>En algunos sistemas de almacenamiento de tipo RAID, los discos duros que componen el RAID, suelen tener la característica “Hot Swap” o “Hot Plug”, y permiten ser sustituidos “en caliente”, sin necesidad de detener el ordenador o hardware que los gestiona. En este apartado trabajaremos creando un RAID por software en un sistema Microsoft.</text:p>
                <text:p text:style-name="P3">Se utilizará una máquina virtual con el sistema operativo Windows Server instalado.</text:p>
                <text:p text:style-name="P3">Se debe agregar a la máquina virtual los discos duros necesarios para poder realizar las siguientes acciones que se proponen.</text:p>
                <text:p text:style-name="P3">En el servidor con Windows Server, se nos propone implementar un RAID 0 de forma que usando la herramienta Administrador de Discos de Windows Server se han de realizar las siguientes acciones:</text:p>
                <text:p text:style-name="P6"><text:span text:style-name="T4"><text:line-break/></text:span><text:span text:style-name="Strong_20_Emphasis"><text:span text:style-name="T4">Parte 1:</text:span></text:span><text:span text:style-name="T4"><text:line-break/>- Crear un RAID 0.</text:span></text:p>
                <text:p text:style-name="P3">- Etiquetar el volumen creado como “RAID0-XXX”, donde XXX serán las iniciales del alumno. Por ejemplo, en mi caso, el nombre del volumen será: RAID0-AMA (Antonio Moreno Aguilera)</text:p>
                <text:p text:style-name="P3">- Comprobar desde el explorador de Windows que está operativo copiando alguna información dentro del volumen que representa al RAID0.</text:p>
                <text:p text:style-name="P6"><text:span text:style-name="T4">- Romper el RAID 0 (desconectando un disco, por ejemplo) y comprobar desde el explorador de archivos que ha pasado con la información. Comenta debidamente (con </text:span><text:soft-page-break/><text:span text:style-name="T4">una breve explicación y capturas de pantalla) qué ocurre cuando se rompe el RAID 0.<text:line-break/><text:line-break/></text:span><text:span text:style-name="Strong_20_Emphasis"><text:span text:style-name="T4">Parte 2:</text:span></text:span><text:span text:style-name="T4"><text:line-break/>-Crear un RAID 5.</text:span></text:p>
                <text:p text:style-name="P3">- Etiquetar el volumen creado como “RAID5-XXX”, donde XXX serán las iniciales del alumno. Por ejemplo, en mi caso, el nombre del volumen será: RAID5-AMA (Antonio Moreno Aguilera)</text:p>
                <text:p text:style-name="P3">- Comprobar desde el explorador de Windows que está operativo copiando alguna información dentro del volumen que representa al RAID5.</text:p>
                <text:p text:style-name="P6"><text:span text:style-name="T4">- Romper el RAID5 (desconectando un disco, por ejemplo) y comprobar desde el explorador de archivos que ha pasado con la información. Comenta debidamente (con una breve explicación y capturas de pantalla) qué ocurre cuando se rompe el RAID 5.<text:line-break/><text:line-break/></text:span><text:span text:style-name="Strong_20_Emphasis"><text:span text:style-name="T4">Parte 3:</text:span></text:span><text:span text:style-name="T4"><text:line-break/>-Indica que diferencia hay entre un RAID 0 y un RAID 5.</text:span></text:p>
                <text:p text:style-name="P7"> </text:p>
                <text:p text:style-name="P6"><text:span text:style-name="T4"><text:line-break/></text:span><text:span text:style-name="Strong_20_Emphasis"><text:span text:style-name="T4">Documente todos estos procesos realizados con comentarios breves y significativos de las acciones realizadas y de las capturas de imagen necesarias para demostrar que se han realizado los pasos correctamente y los resultados obtenidos son los requeridos.</text:span></text:span></text:p>
                <text:p text:style-name="P6"><text:span text:style-name="Strong_20_Emphasis"><text:span text:style-name="T5"> </text:span></text:span></text:p>
                <text:p text:style-name="P7"> </text:p>
                <text:p text:style-name="P6"><text:span text:style-name="T5"> </text:span><text:span text:style-name="Emphasis"><text:span text:style-name="Strong_20_Emphasis"><text:span text:style-name="T5"> </text:span></text:span></text:span></text:p>
              </table:table-cell>
            </table:table-row>
          </table:table>
          <text:p text:style-name="P4"/>
        </text:section>
      </text:section>
      <text:section text:style-name="Sect1" text:name="id26">
        <text:p text:style-name="P5"/>
        <text:section text:style-name="Sect1" text:name="ta26_1">
          <text:p text:style-name="P1">¿Qué debes tener en cuenta para resolver la tarea?</text:p>
          <table:table table:name="Tabla3" table:style-name="Tabla3">
            <table:table-column table:style-name="Tabla3.A"/>
            <table:table-row table:style-name="Tabla3.1">
              <table:table-cell table:style-name="Tabla3.A1" office:value-type="string">
                <text:p text:style-name="P2"><text:span text:style-name="Strong_20_Emphasis"><text:span text:style-name="T1">CONSEJOS Y RECOMENDACIONES PARA REALIZAR LA TAREA.</text:span></text:span><text:span text:style-name="T2"/></text:p>
              </table:table-cell>
            </table:table-row>
            <table:table-row table:style-name="Tabla3.1">
              <table:table-cell table:style-name="Tabla3.A2" office:value-type="string">
                <text:p text:style-name="P3">Para realizar esta tarea es aconsejable seguir los siguientes pasos:<text:line-break/></text:p>
                <text:p text:style-name="P3">Para la mejor realización del apartado RA04_e) puede revisar el Epígrafe 7. Arquitectura de alta disponibilidad</text:p>
                <text:p text:style-name="P3"><text:line-break/>Para la resolución del apartado RA04_f) debería consultar el Epígrafe 6.3 Discos. Sistemas RAID. Igualmente para tener una visión clara de los conceptos y tipos de RAID que se pueden gestionar en Windows, sería recomendable visualizar los Vídeo Conceptos de la unidad 4.</text:p>
                <text:p text:style-name="P3">La operación de creación de un RAID por software en Windows Server se puede realizar usando la herramienta Administrador de discos. Puede ser de gran utilidad el ejercicio resuelto "Usar Administración de discos en Windows" de la unidad 04, para comenzar a usar debidamente esta herramienta. Así como también el ejercicio resuelto "Tipos de RAID" de la misma unidad.</text:p>
                <text:p text:style-name="P3">También, para la creación de un RAID desde el administrador de Windows Server puede ser de gran ayuda visualizar y consultar el documento desarrollo de la clase, así como la sesión online "RAID en Windows Server" de la unidad 04.<text:span text:style-name="T3"/></text:p>
              </table:table-cell>
            </table:table-row>
          </table:table>
          <text:p text:style-name="P4"/>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22:11.294640700</meta:creation-date>
    <dc:date>2026-06-15T10:23:05.709447500</dc:date>
    <meta:editing-duration>PT54S</meta:editing-duration>
    <meta:editing-cycles>1</meta:editing-cycles>
    <meta:document-statistic meta:table-count="3" meta:image-count="0" meta:object-count="0" meta:page-count="2" meta:paragraph-count="36" meta:word-count="753" meta:character-count="4674" meta:non-whitespace-character-count="3936"/>
    <meta:generator>LibreOffice/26.2.3.2$Windows_X86_64 LibreOffice_project/70e089b17412e4cb7773e41413306b17a2328c34</meta:generator>
  </office:meta>
</office:document-meta>
</file>