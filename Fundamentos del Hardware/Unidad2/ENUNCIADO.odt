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2" style:family="table">
      <style:table-properties style:width="17cm" table:align="left"/>
    </style:style>
    <style:style style:name="Tabla2.A" style:family="table-column">
      <style:table-column-properties style:column-width="17cm"/>
    </style:style>
    <style:style style:name="Tabla2.1" style:family="table-row">
      <style:table-row-properties fo:background-color="#fcfdfe">
        <style:background-image/>
      </style:table-row-properties>
    </style:style>
    <style:style style:name="Tabla2.A1" style:family="table-cell">
      <style:table-cell-properties style:vertical-align="middle" fo:background-color="#c3dcf7" fo:padding="0.049cm" fo:border="0.5pt solid #d4e0ee">
        <style:background-image/>
      </style:table-cell-properties>
    </style:style>
    <style:style style:name="Tabla2.A2" style:family="table-cell">
      <style:table-cell-properties style:vertical-align="middle" fo:padding="0.049cm" fo:border="0.5pt solid #d4e0ee"/>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fcfdfe">
        <style:background-image/>
      </style:table-row-properties>
    </style:style>
    <style:style style:name="Tabla3.A1" style:family="table-cell">
      <style:table-cell-properties style:vertical-align="middle" fo:background-color="#c3dcf7" fo:padding="0.049cm" fo:border="0.5pt solid #d4e0ee">
        <style:background-image/>
      </style:table-cell-properties>
    </style:style>
    <style:style style:name="Tabla3.A2" style:family="table-cell">
      <style:table-cell-properties style:vertical-align="middle" fo:padding="0.049cm" fo:border="0.5pt solid #d4e0e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555555" loext:opacity="100%" style:font-name="HelveticaNeue-Ligh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font-name-asian="HelveticaNeue-Light" style:font-size-asian="12pt" style:font-style-asian="normal" style:font-weight-asian="normal" style:font-name-complex="HelveticaNeue-Light" style:font-size-complex="12pt" style:font-style-complex="normal" style:font-weight-complex="normal" loext:padding="0cm" loext:border="none"/>
    </style:style>
    <style:style style:name="P5" style:family="paragraph" style:parent-style-name="Standard">
      <style:paragraph-properties fo:margin-left="0cm" fo:margin-right="0cm" fo:text-indent="0cm" style:auto-text-indent="false"/>
    </style:style>
    <style:style style:name="P6" style:family="paragraph" style:parent-style-name="Table_20_Contents">
      <style:paragraph-properties fo:margin-left="0cm" fo:margin-right="0cm" fo:margin-top="0cm" fo:margin-bottom="0cm" style:contextual-spacing="false" fo:text-indent="0cm" style:auto-text-indent="false"/>
    </style:style>
    <style:style style:name="P7" style:family="paragraph" style:parent-style-name="Table_20_Contents" style:list-style-name="L1">
      <style:paragraph-properties fo:margin-left="0cm" fo:margin-right="0cm" fo:text-indent="0cm" style:auto-text-indent="false"/>
      <style:text-properties fo:color="#555555" loext:opacity="100%" style:font-name="HelveticaNeue-Light"/>
    </style:style>
    <style:style style:name="P8" style:family="paragraph" style:parent-style-name="Table_20_Contents" style:list-style-name="L1">
      <style:paragraph-properties fo:margin-left="0cm" fo:margin-right="0cm" fo:margin-top="0cm" fo:margin-bottom="0.499cm" style:contextual-spacing="false" fo:text-indent="0cm" style:auto-text-indent="false"/>
      <style:text-properties fo:color="#555555" loext:opacity="100%" style:font-name="HelveticaNeue-Light"/>
    </style:style>
    <style:style style:name="P9" style:family="paragraph" style:parent-style-name="Table_20_Contents" style:list-style-name="L2">
      <style:paragraph-properties fo:margin-left="0cm" fo:margin-right="0cm" fo:margin-top="0cm" fo:margin-bottom="0.499cm" style:contextual-spacing="false" fo:text-indent="0cm" style:auto-text-indent="false"/>
    </style:style>
    <style:style style:name="P10" style:family="paragraph" style:parent-style-name="Table_20_Contents" style:list-style-name="L3">
      <style:paragraph-properties fo:margin-left="0cm" fo:margin-right="0cm" fo:margin-top="0cm" fo:margin-bottom="0.499cm" style:contextual-spacing="false" fo:text-indent="0cm" style:auto-text-indent="false"/>
    </style:style>
    <style:style style:name="P11" style:family="paragraph" style:parent-style-name="Table_20_Contents" style:list-style-name="L4">
      <style:paragraph-properties fo:margin-left="0cm" fo:margin-right="0cm" fo:margin-top="0cm" fo:margin-bottom="0.499cm" style:contextual-spacing="false" fo:text-indent="0cm" style:auto-text-indent="false"/>
    </style:style>
    <style:style style:name="P12" style:family="paragraph" style:parent-style-name="Table_20_Contents" style:list-style-name="L5">
      <style:paragraph-properties fo:margin-left="0cm" fo:margin-right="0cm" fo:margin-top="0cm" fo:margin-bottom="0.499cm" style:contextual-spacing="false" fo:text-indent="0cm" style:auto-text-indent="false"/>
      <style:text-properties fo:color="#555555" loext:opacity="100%" style:font-name="HelveticaNeue-Light"/>
    </style:style>
    <style:style style:name="P13" style:family="paragraph" style:parent-style-name="Table_20_Contents" style:list-style-name="L6">
      <style:paragraph-properties fo:margin-left="0cm" fo:margin-right="0cm" fo:text-indent="0cm" style:auto-text-indent="false"/>
      <style:text-properties fo:color="#555555" loext:opacity="100%" style:font-name="HelveticaNeue-Light"/>
    </style:style>
    <style:style style:name="P14" style:family="paragraph" style:parent-style-name="Table_20_Contents" style:list-style-name="L6">
      <style:paragraph-properties fo:margin-left="0cm" fo:margin-right="0cm" fo:margin-top="0cm" fo:margin-bottom="0.499cm" style:contextual-spacing="false" fo:text-indent="0cm" style:auto-text-indent="false"/>
      <style:text-properties fo:color="#555555" loext:opacity="100%" style:font-name="HelveticaNeue-Light"/>
    </style:style>
    <style:style style:name="P15" style:family="paragraph" style:parent-style-name="Table_20_Contents">
      <style:paragraph-properties fo:margin-left="0cm" fo:margin-right="0cm" fo:margin-top="0cm" fo:margin-bottom="0cm" style:contextual-spacing="false" fo:text-indent="0cm" style:auto-text-indent="false"/>
      <style:text-properties fo:color="#555555" loext:opacity="100%"/>
    </style:style>
    <style:style style:name="P16" style:family="paragraph" style:parent-style-name="Table_20_Contents" style:list-style-name="L7">
      <style:paragraph-properties fo:margin-left="0cm" fo:margin-right="0cm" fo:margin-top="0cm" fo:margin-bottom="0.499cm" style:contextual-spacing="false" fo:text-indent="0cm" style:auto-text-indent="false"/>
      <style:text-properties fo:color="#555555" loext:opacity="100%" style:font-name="HelveticaNeue-Light" fo:font-size="12pt"/>
    </style:style>
    <style:style style:name="P17" style:family="paragraph" style:parent-style-name="Table_20_Contents" style:list-style-name="L8">
      <style:paragraph-properties fo:margin-left="0cm" fo:margin-right="0cm" fo:margin-top="0cm" fo:margin-bottom="0.499cm" style:contextual-spacing="false" fo:text-indent="0cm" style:auto-text-indent="false"/>
      <style:text-properties fo:color="#555555" loext:opacity="100%" style:font-name="HelveticaNeue-Light" fo:font-size="12pt"/>
    </style:style>
    <style:style style:name="T1" style:family="text">
      <style:text-properties fo:color="#153152" loext:opacity="100%" style:font-name="HelveticaNeue-Light" fo:font-size="18pt" fo:font-weight="bold"/>
    </style:style>
    <style:style style:name="T2" style:family="text">
      <style:text-properties fo:color="#153152" loext:opacity="100%" style:font-name="HelveticaNeue-Light" fo:font-size="18pt" fo:font-weight="bold" style:font-name-asian="HelveticaNeue-Light" style:font-weight-asian="bold" style:font-name-complex="HelveticaNeue-Light" style:font-weight-complex="bold"/>
    </style:style>
    <style:style style:name="T3" style:family="text">
      <style:text-properties fo:color="#555555" loext:opacity="100%" style:font-name="HelveticaNeue-Light" style:font-name-asian="HelveticaNeue-Light" style:font-name-complex="HelveticaNeue-Light"/>
    </style:style>
    <style:style style:name="T4" style:family="text">
      <style:text-properties fo:color="#555555" loext:opacity="100%"/>
    </style:style>
    <style:style style:name="T5" style:family="text">
      <style:text-properties fo:color="#555555" loext:opacity="100%" style:font-name="HelveticaNeue-Light"/>
    </style:style>
    <style:style style:name="T6" style:family="text">
      <style:text-properties fo:font-weight="bold"/>
    </style:style>
    <style:style style:name="T7" style:family="text">
      <style:text-properties style:font-name="HelveticaNeue-Ligh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24">
        <text:section text:style-name="Sect1" text:name="ta24_1">
          <text:p text:style-name="P1">Introducción de la tarea</text:p>
          <table:table table:name="Tabla1" table:style-name="Tabla1">
            <table:table-column table:style-name="Tabla1.A"/>
            <table:table-row table:style-name="Tabla1.1">
              <table:table-cell table:style-name="Tabla1.A1" office:value-type="string">
                <text:p text:style-name="P2"><text:span text:style-name="Strong_20_Emphasis"><text:span text:style-name="T1">CONTEXTO DE LA TAREA</text:span></text:span><text:span text:style-name="T2"/></text:p>
              </table:table-cell>
            </table:table-row>
            <table:table-row table:style-name="Tabla1.1">
              <table:table-cell table:style-name="Tabla1.A2" office:value-type="string">
                <text:p text:style-name="P3">Con esta tarea aprenderemos a identificar, evaluar y comparar cada uno de los componentes de un sistema informático. El objetivo será familiarizarnos con los distintos elementos necesarios para el montaje y actualización de un equipo informático. También aprenderemos a acceder al SETUP de la BIOS de un PC para configurar algunas opciones. <text:span text:style-name="T3"/></text:p>
              </table:table-cell>
            </table:table-row>
          </table:table>
          <text:p text:style-name="P4"/>
        </text:section>
      </text:section>
      <text:section text:style-name="Sect1" text:name="id25">
        <text:p text:style-name="P5"/>
        <text:section text:style-name="Sect1" text:name="ta25_1">
          <text:p text:style-name="P1">¿Qué debes hacer?</text:p>
          <table:table table:name="Tabla2" table:style-name="Tabla2">
            <table:table-column table:style-name="Tabla2.A"/>
            <table:table-row table:style-name="Tabla2.1">
              <table:table-cell table:style-name="Tabla2.A1" office:value-type="string">
                <text:p text:style-name="P2"><text:span text:style-name="Strong_20_Emphasis"><text:span text:style-name="T1">ENUNCIADO DE LA TAREA</text:span></text:span><text:span text:style-name="T2"/></text:p>
              </table:table-cell>
            </table:table-row>
            <table:table-row table:style-name="Tabla2.1">
              <table:table-cell table:style-name="Tabla2.A2" office:value-type="string">
                <text:p text:style-name="P3">En esta tarea deberá de obtener información sobre la configuración de un sistema informático especializado. En concreto se buscarán componentes actualmente a la venta en el mercado informático, con el objetivo de la actualización o montaje de hardware de un equipo informático.<text:line-break/>Para ello se puede consultar información en cualquier tienda de venta de componentes informáticos.<text:line-break/>También deberá de trabajar con su propio ordenador, consultando datos sobre el hardware y la BIOS del mismo.</text:p>
                <text:p text:style-name="P3"><text:line-break/>Realice los siguientes apartados:</text:p>
                <text:p text:style-name="P6"><text:span text:style-name="Emphasis"><text:span text:style-name="Strong_20_Emphasis"><text:span text:style-name="T4"> </text:span></text:span></text:span></text:p>
                <text:p text:style-name="P6"><text:span text:style-name="Strong_20_Emphasis"><text:span text:style-name="T5">RA1_f)</text:span></text:span><text:span text:style-name="T5">  </text:span><text:span text:style-name="Strong_20_Emphasis"><text:span text:style-name="T5">Se han ejecutado utilidades de chequeo y diagnóstico<text:line-break/><text:line-break/></text:span></text:span><text:span text:style-name="T5">Investigue y obtenga el </text:span><text:span text:style-name="Strong_20_Emphasis"><text:span text:style-name="T5">nombre</text:span></text:span><text:span text:style-name="T5"> de la placa base, </text:span><text:span text:style-name="Strong_20_Emphasis"><text:span text:style-name="T5">marca</text:span></text:span><text:span text:style-name="T5"> y </text:span><text:span text:style-name="Strong_20_Emphasis"><text:span text:style-name="T5">modelo</text:span></text:span><text:span text:style-name="T5">, de su ordenador, (puede usar algún software de chequeo, la información proporcionada por el sistema operativo o la BIOS). Indique marca y modelo e inserte en el documento informe de entrega de la tarea una </text:span><text:span text:style-name="Strong_20_Emphasis"><text:span text:style-name="T5">foto o captura de pantalla</text:span></text:span><text:span text:style-name="T5"> donde se aprecie este dato.</text:span></text:p>
                <text:p text:style-name="P3">En el caso de ordenadores portátiles es posible que sea complicado obtener el modelo exacto de la placa base, en este caso bastará con indicar y mostrar datos sobre el ChipSet de la placa base o el modelo de portátil.</text:p>
                <text:p text:style-name="P6"><text:span text:style-name="Emphasis"><text:span text:style-name="Strong_20_Emphasis"><text:span text:style-name="T4"> </text:span></text:span></text:span></text:p>
                <text:p text:style-name="P6"><text:span text:style-name="Strong_20_Emphasis"><text:span text:style-name="T5">RA1_d) Se han establecido los parámetros de configuración (hardware y software) de un equipo microinformático con las utilidades específicas</text:span></text:span></text:p>
                <text:p text:style-name="P3"><text:span text:style-name="T6">Parte 1.<text:line-break/></text:span><text:line-break/>Acceda al SETUP de la BIOS de su ordenador y muestre el apartado donde se puede cambiar el orden de arranque o secuencia de arranque de la placa base.</text:p>
                <text:p text:style-name="P3">Responda a las siguientes preguntas:</text:p>
                <text:p text:style-name="P3">- ¿Qué tecla o combinación de teclas ha usado para acceder al SETUP de la BIOS?</text:p>
                <text:p text:style-name="P3">- Enumere y describa las distintas opciones que proporciona la placa base para iniciar el sistema desde distintos dispositivos de arranque. Inserte en el documento informe de entrega de la tarea una foto o captura de pantalla donde se aprecie este apartado del SETUP de la BIOS con sus opciones.<text:line-break/> <text:line-break/>Puede usar para este apartado la información contenida en el manual de la placa base de su ordenador, o en la página web del fabricante.<text:line-break/>No es necesario adjuntar el manual de la placa base de su ordenador.</text:p>
                <text:p text:style-name="P6"><text:span text:style-name="Emphasis"><text:span text:style-name="Strong_20_Emphasis"><text:span text:style-name="T5"><text:line-break/></text:span></text:span></text:span><text:soft-page-break/><text:span text:style-name="Strong_20_Emphasis"><text:span text:style-name="T5">Parte 2.</text:span></text:span><text:span text:style-name="T5"> <text:line-break/><text:line-break/>El alumno </text:span><text:span text:style-name="Strong_20_Emphasis"><text:span text:style-name="T5">debe elegir</text:span></text:span><text:span text:style-name="T5"> </text:span><text:span text:style-name="Strong_20_Emphasis"><text:span text:style-name="T5">una placa base</text:span></text:span><text:span text:style-name="T5"> disponible en el mercado, no tiene por qué ser la placa base de su ordenador, puede ser cualquier placa base a la venta actualmente. Deberá </text:span><text:span text:style-name="Strong_20_Emphasis"><text:span text:style-name="T5">indicar en el documento informe</text:span></text:span><text:span text:style-name="T5"> en pdf de la tarea:</text:span></text:p>
                <text:list text:style-name="L1">
                  <text:list-item>
                    <text:p text:style-name="P7">El nombre y modelo de la placa que ha elegido.</text:p>
                  </text:list-item>
                  <text:list-item>
                    <text:p text:style-name="P7">Incluir una imagen de dicha placa.</text:p>
                  </text:list-item>
                  <text:list-item>
                    <text:p text:style-name="P8">El enlace a la web de venta donde se podría comprar.</text:p>
                  </text:list-item>
                </text:list>
                <text:p text:style-name="P3">Se debe de acceder a la web del fabricante de la placa base y </text:p>
                <text:list text:style-name="L2">
                  <text:list-item>
                    <text:p text:style-name="P9"><text:span text:style-name="Strong_20_Emphasis"><text:span text:style-name="T5">descargar el manual en pdf de la placa base</text:span></text:span><text:span text:style-name="T5"> (posteriormente se adjuntará en la entrega de la tarea comprimido en el zip)</text:span></text:p>
                  </text:list-item>
                </text:list>
                <text:p text:style-name="P6"><text:span text:style-name="T5">En el proceso de puesta en marcha de un equipo interviene en primer lugar el </text:span><text:span text:style-name="Strong_20_Emphasis"><text:span text:style-name="T5">BIOS</text:span></text:span><text:span text:style-name="T5"> de la placa base.</text:span></text:p>
                <text:list text:style-name="L3">
                  <text:list-item>
                    <text:p text:style-name="P10"><text:span text:style-name="T5">Incluya una imagen o captura de el tipo, modelo, versión o </text:span><text:span text:style-name="Strong_20_Emphasis"><text:span text:style-name="T5">características del BIOS</text:span></text:span><text:span text:style-name="T5"> de la placa base que has elegido.</text:span></text:p>
                  </text:list-item>
                </text:list>
                <text:p text:style-name="P6"><text:span text:style-name="T5"><text:line-break/>Esta información debe de estar incluida en el manual del fabricante que has descargado anteriormente, normalmente aparece al principio del manual, en la tabla resumen de especificaciones.</text:span><text:span text:style-name="Emphasis"><text:span text:style-name="T5"><text:line-break/></text:span></text:span><text:span text:style-name="Emphasis"><text:span text:style-name="Strong_20_Emphasis"><text:span text:style-name="T5"><text:line-break/></text:span></text:span></text:span><text:span text:style-name="T5">Consulte en el manual de la placa base la información sobre el tipo o tipos de procesador o </text:span><text:span text:style-name="Strong_20_Emphasis"><text:span text:style-name="T5">CPU</text:span></text:span><text:span text:style-name="T5"> que puede soportar la placa.</text:span></text:p>
                <text:list text:style-name="L4">
                  <text:list-item>
                    <text:p text:style-name="P11"><text:span text:style-name="T5">Incluya una captura de pantalla donde se indique el</text:span><text:span text:style-name="Strong_20_Emphasis"><text:span text:style-name="T5"> tipo de socket o zócalo de procesador</text:span></text:span><text:span text:style-name="T5"> y </text:span><text:span text:style-name="Strong_20_Emphasis"><text:span text:style-name="T5">tipo</text:span></text:span><text:span text:style-name="T5"> o tipos de </text:span><text:span text:style-name="Strong_20_Emphasis"><text:span text:style-name="T5">procesadores</text:span></text:span><text:span text:style-name="T5"> que se pueden montar en la placa base. </text:span></text:p>
                  </text:list-item>
                </text:list>
                <text:p text:style-name="P6"><text:span text:style-name="Emphasis"><text:span text:style-name="Strong_20_Emphasis"><text:span text:style-name="T5"><text:line-break/></text:span></text:span></text:span><text:span text:style-name="T5">El alumno debe consultar el manual y acceder a la información sobre </text:span><text:span text:style-name="Strong_20_Emphasis"><text:span text:style-name="T5">los conectores externos o traseros</text:span></text:span><text:span text:style-name="T5"> que ofrece la placa base,</text:span></text:p>
                <text:list text:style-name="L5">
                  <text:list-item>
                    <text:p text:style-name="P12">Se obtendrá una captura de pantalla donde aparezca esta información y se insertará como imagen en el informe en pdf.</text:p>
                  </text:list-item>
                </text:list>
                <text:p text:style-name="P6"><text:span text:style-name="Strong_20_Emphasis"><text:span text:style-name="T5">Parte 3. </text:span></text:span></text:p>
                <text:p text:style-name="P3">En el proceso de puesta en marcha de un equipo interviene en primer lugar el BIOS de la placa base.</text:p>
                <text:p text:style-name="P6"><text:span text:style-name="T5">Para este apartado se debe de descargar el manual de usuario de la placa base </text:span><text:span text:style-name="Strong_20_Emphasis"><text:span text:style-name="T5">ASUS Prime B660-PLUS D4</text:span></text:span><text:span text:style-name="T5">, descargar la versión en inglés, de 36 páginas.</text:span></text:p>
                <text:p text:style-name="P3"><text:line-break/>En este manual hay una sección dedicada al programa Setup de la BIOS, y más en concreto una parte en donde se dan instrucciones sobre la forma de entrar o acceder a la BIOS. Lo que se describe en esta parte del manual del fabricante es qué tecla o teclas hay que pulsar y en qué momento, para acceder a la BIOS.</text:p>
                <text:p text:style-name="P3">Incluya una imagen o captura de esta parte del manual en el informe de la tarea.</text:p>
                <text:p text:style-name="P3"><text:line-break/>Basándose en esta información, responda a la siguiente pregunta: ¿Qué tecla o teclas hay que presionar en esta placa base, para entrar a la BIOS durante el inicio o arranque del PC?</text:p>
                <text:p text:style-name="P6"><text:span text:style-name="T5">Seguimos trabajando sobre el manual de usuario de la placa base </text:span><text:span text:style-name="Strong_20_Emphasis"><text:span text:style-name="T5">ASUS Prime B660-PLUS D4</text:span></text:span><text:span text:style-name="T5">, versión en inglés, de 36 páginas.</text:span></text:p>
                <text:p text:style-name="P3"><text:soft-page-break/>Consultando el manual, responde a las siguientes cuestiones:</text:p>
                <text:list text:style-name="L6">
                  <text:list-item>
                    <text:p text:style-name="P13">Cuantos zócalos de memoria RAM tiene la placa.</text:p>
                  </text:list-item>
                  <text:list-item>
                    <text:p text:style-name="P13">Cuanta RAM máxima (en GB) podemos instalar a esta placa.</text:p>
                  </text:list-item>
                  <text:list-item>
                    <text:p text:style-name="P13">Como se llaman los conectores de la placa donde se puede instalar o conectar un monitor.</text:p>
                  </text:list-item>
                  <text:list-item>
                    <text:p text:style-name="P14">Cuantos conectores USB tiene la placa base en la parte trasera o panel trasero.</text:p>
                  </text:list-item>
                </text:list>
                <text:p text:style-name="P6"><text:span text:style-name="Strong_20_Emphasis"><text:span text:style-name="T5"><text:line-break/>RA1_g) Se han identificado averías y sus causas</text:span></text:span><text:span text:style-name="T5"> </text:span></text:p>
                <text:p text:style-name="P6"><text:span text:style-name="Strong_20_Emphasis"><text:span text:style-name="T5"><text:line-break/></text:span></text:span><text:span text:style-name="T5">Una vez montado un equipo, enchufado el monitor, ratón y teclado, se procede a encenderlo, se escucha un solo pitido y aparece un mensaje como el siguiente:</text:span></text:p>
                <text:p text:style-name="P15"> </text:p>
                <text:p text:style-name="P6"><text:span text:style-name="T4">“</text:span><text:span text:style-name="T5">Reboot and Select proper Boot device or Insert Boot Media in selected Boot device and press a key”. Indica </text:span><text:span text:style-name="Strong_20_Emphasis"><text:span text:style-name="T5">que quiere decir este mensaje</text:span></text:span><text:span text:style-name="T5">.</text:span></text:p>
                <text:p text:style-name="P6"><text:span text:style-name="T5">Consulte el manual de usuario de la placa base ASUS Prime B660-PLUS D4, versión en inglés, de 36 páginas. En este manual hay una sección (al principio del manual) sobre información de seguridad (safety information), en esta sección se habla del peligro de una </text:span><text:span text:style-name="Strong_20_Emphasis"><text:span text:style-name="T5">descarga eléctrica</text:span></text:span><text:span text:style-name="T5"> (electrical shock hazard), ¿Qué recomienda el fabricante para evitar estas descargas mientras manipulamos la placa y sus componentes?</text:span></text:p>
                <text:p text:style-name="P3"><text:line-break/>En este mismo manual, en cuanto a la instalación de la CPU, el fabricante dice:</text:p>
                <text:p text:style-name="P15">“<text:span text:style-name="T7">ASUS will not cover damages resulting from incorrect CPU installation/removal, incorrect CPU orientation/placement, or other damages resulting from negligence by te user”</text:span></text:p>
                <text:p text:style-name="P6"><text:span text:style-name="T5">Explica </text:span><text:span text:style-name="Strong_20_Emphasis"><text:span text:style-name="T5">que nos quiere decir</text:span></text:span><text:span text:style-name="T5"> el fabricante con esta advertencia.</text:span></text:p>
              </table:table-cell>
            </table:table-row>
          </table:table>
          <text:p text:style-name="P4"/>
        </text:section>
      </text:section>
      <text:section text:style-name="Sect1" text:name="id26">
        <text:p text:style-name="P5"/>
        <text:section text:style-name="Sect1" text:name="ta26_1">
          <text:p text:style-name="P1">¿Qué debes tener en cuenta para resolver la tarea?</text:p>
          <table:table table:name="Tabla3" table:style-name="Tabla3">
            <table:table-column table:style-name="Tabla3.A"/>
            <table:table-row table:style-name="Tabla3.1">
              <table:table-cell table:style-name="Tabla3.A1" office:value-type="string">
                <text:p text:style-name="P2"><text:span text:style-name="Strong_20_Emphasis"><text:span text:style-name="T1">CONSEJOS Y RECOMENDACIONES PARA REALIZAR LA TAREA.</text:span></text:span><text:span text:style-name="T2"/></text:p>
              </table:table-cell>
            </table:table-row>
            <table:table-row table:style-name="Tabla3.1">
              <table:table-cell table:style-name="Tabla3.A2" office:value-type="string">
                <text:p text:style-name="P3">Para realizar esta tarea es aconsejable seguir los siguientes pasos: </text:p>
                <text:list text:style-name="L7">
                  <text:list-item>
                    <text:p text:style-name="P16">Para elegir una placa base actual, da igual la marca y el modelo, se ha de consultar una web de venta de componentes. Ver el ejercicio resuelto "Búsqueda de compatibilidad entre componentes". Así como también sería conveniente visualizar la sesión "Componentes de un sistema informático I". También sería de ayuda consultar el epígrafe 6.4 de la unidad.</text:p>
                  </text:list-item>
                  <text:list-item>
                    <text:p text:style-name="P16">Se pide en la tarea acceder a la web del fabricante y descargar el manual en pdf de la placa base, para esto se recomienda consultar el ejercicio resuelto "obtener manual de la placa base".</text:p>
                  </text:list-item>
                  <text:list-item>
                    <text:p text:style-name="P16">Una vez tengamos el manual de la placa base en pdf, se buscará en el índice para obtener información sobre las distintas cuestiones que se nos plantean en la tarea. Cuando se habla de los conectores traseros o externos de la placa, en el manual, estos pueden aparecer como "rear panel connectors".</text:p>
                  </text:list-item>
                </text:list>
                <text:list text:style-name="L8">
                  <text:list-item>
                    <text:p text:style-name="P17">Para saber el nombre de una placa base y descargar el manual, puede ser de ayuda consultar el ejercicio resuelto "obtener manual de la placa base" de la unidad, así como el vídeo concepto "Identificar Placa base" y “Obtener manual Placa Base” de la unidad. También puede usar alguno de los programas descritos <text:soft-page-break/>en el epígrafe "Chequeo y diagnóstico" de la unidad.</text:p>
                  </text:list-item>
                  <text:list-item>
                    <text:p text:style-name="P17">Para acceder al SETUP de la BIOS del ordenador y buscar las opciones de arranque pueden serle de utilidad la consulta de los ejercicios “Arranque y opciones de la BIOS I y II” de la unidad. También sería conveniente la lectura de la unidad en su epígrafe "Accediendo al Setup de la BIOS. Para resolver el apartado sobre los conectores externos, puede serle de ayuda consultar el ejercicio resuelto "Conectores externos de un PC".<text:span text:style-name="T3"/></text:p>
                  </text:list-item>
                </text:list>
              </table:table-cell>
            </table:table-row>
          </table:table>
          <text:p text:style-name="P4"/>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5T10:19:31.003942900</meta:creation-date>
    <dc:date>2026-06-15T10:19:53.568025300</dc:date>
    <meta:editing-duration>PT22S</meta:editing-duration>
    <meta:editing-cycles>1</meta:editing-cycles>
    <meta:document-statistic meta:table-count="3" meta:image-count="0" meta:object-count="0" meta:page-count="4" meta:paragraph-count="56" meta:word-count="1409" meta:character-count="8124" meta:non-whitespace-character-count="6758"/>
    <meta:generator>LibreOffice/26.2.3.2$Windows_X86_64 LibreOffice_project/70e089b17412e4cb7773e41413306b17a2328c34</meta:generator>
  </office:meta>
</office:document-meta>
</file>