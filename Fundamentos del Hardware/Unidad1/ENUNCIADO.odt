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8" style:family="paragraph" style:parent-style-name="Table_20_Contents" style:list-style-name="L1">
      <style:paragraph-properties fo:margin-left="0cm" fo:margin-right="0cm" fo:text-indent="0cm" style:auto-text-indent="false"/>
      <style:text-properties fo:color="#555555" loext:opacity="100%" style:font-name="HelveticaNeue-Light"/>
    </style:style>
    <style:style style:name="P9"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T5" style:family="text">
      <style:text-properties fo:color="#555555" loext:opacity="10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repasaremos conceptos sobre el cumplimiento de las normas de prevención de riesgos laborales y protección ambiental<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Para realizar la tarea, trabaje y resuelva los siguientes apartados:<text:line-break/></text:p>
                <text:p text:style-name="P6"><text:span text:style-name="Strong_20_Emphasis"><text:span text:style-name="T4">RA05_a) Se han identificado los riesgos y el nivel de peligrosidad que suponen la manipulación de los materiales, herramientas, útiles, máquinas y medios de transporte.</text:span></text:span></text:p>
                <text:p text:style-name="P7"> </text:p>
                <text:p text:style-name="P3">Es función de los empresarios realizar la evaluación de riesgos para la seguridad y salud de los trabajadores. Dependiendo de las funciones que realice el trabajador los riesgos a los que está sometido son diferentes.</text:p>
                <text:p text:style-name="P3">En entornos informáticos los riesgos principales se pueden dividir en 5 grupos. Enumera esos riesgos y explica brevemente en qué consisten.</text:p>
                <text:p text:style-name="P7"> </text:p>
                <text:p text:style-name="P7"> </text:p>
                <text:p text:style-name="P6"><text:span text:style-name="Strong_20_Emphasis"><text:span text:style-name="T4">RA05_d) Se han descrito los elementos de seguridad (protecciones, alarmas, pasos de emergencia, entre otros) de las máquinas y los equipos de protección individual (calzado, protección ocular, indumentaria, entre otros) que se deben emplear en las distintas operaciones de montaje y mantenimiento.</text:span></text:span></text:p>
                <text:p text:style-name="P7"> </text:p>
                <text:p text:style-name="P3">Además de la norma general de no llevar la ropa suelta y de que ésta sea cómoda, existen elementos en la vestimenta o indumentaria de una persona que trabaja en un entorno informático, que nos proporcionarán una seguridad mayor. Indica cuales son estos elementos, no es necesario que expliques en que consiste cada elemento, simplemente enuméralos.</text:p>
                <text:p text:style-name="P7"> </text:p>
                <text:p text:style-name="P6"><text:span text:style-name="Strong_20_Emphasis"><text:span text:style-name="T4">RA05_e) Se ha relacionado la manipulación de materiales, herramientas y máquinas con las medidas de seguridad y protección personal requeridos.</text:span></text:span></text:p>
                <text:p text:style-name="P3"><text:line-break/>En cuanto a protección personal del empleado, no solamente tenemos que tener en cuenta los materiales y máquinas con las que se va a trabajar, es también muy importante saber manipular de forma correcta las herramientas que ayudarán a solucionar problemas en el entorno informático. Un uso adecuado de estas herramientas evitará en gran medida los riesgos a los que el trabajador está expuesto.</text:p>
                <text:p text:style-name="P7"> </text:p>
                <text:p text:style-name="P3">Indica al menos 4 herramientas que pueden considerarse comunes en este contexto informático, y explica para que se usan.</text:p>
                <text:p text:style-name="P7"> </text:p>
                <text:p text:style-name="P7"> </text:p>
                <text:p text:style-name="P6"><text:span text:style-name="Strong_20_Emphasis"><text:span text:style-name="T4">RA05_h) Se ha valorado el orden y la limpieza de instalaciones y equipos como primer factor de prevención de riesgos.</text:span></text:span></text:p>
                <text:p text:style-name="P7"> </text:p>
                <text:p text:style-name="P3">En cuanto al orden y limpieza de instalaciones y equipos como primer factor de <text:soft-page-break/>prevención de riesgos, indica qué materiales de limpieza utilizarías para cada componente propuesto:</text:p>
                <text:p text:style-name="P7"> </text:p>
                <text:list text:style-name="L1">
                  <text:list-item>
                    <text:p text:style-name="P8">Carcasa o chasis de un PC.</text:p>
                  </text:list-item>
                  <text:list-item>
                    <text:p text:style-name="P8">Pantalla LCD.</text:p>
                  </text:list-item>
                  <text:list-item>
                    <text:p text:style-name="P8">Zócalos de memoria RAM.</text:p>
                  </text:list-item>
                  <text:list-item>
                    <text:p text:style-name="P9">Teclado.</text:p>
                  </text:list-item>
                </text:list>
                <text:p text:style-name="P6"><text:span text:style-name="T4"><text:line-break/></text:span><text:span text:style-name="Strong_20_Emphasis"><text:span text:style-name="T4">Documente todos estos procesos realizados con comentarios breves y significativos de las acciones realizadas y de las capturas de imagen necesarias para demostrar que se han realizado los pasos correctamente y los resultados obtenidos son los requeridos.</text:span></text:span></text:p>
                <text:p text:style-name="P6"><text:span text:style-name="Strong_20_Emphasis"><text:span text:style-name="T5"> </text:span></text:span></text:p>
                <text:p text:style-name="P7"> </text:p>
                <text:p text:style-name="P6"><text:span text:style-name="T5"> </text:span><text:span text:style-name="Emphasis"><text:span text:style-name="Strong_20_Emphasis"><text:span text:style-name="T5"> </text:span></text:span></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es aconsejable seguir los siguientes pasos:<text:line-break/> </text:p>
                <text:p text:style-name="P3">Para el apartado RA05_a) consulte el epígrafe "identificación de riesgos" de la unidad 01.<text:line-break/> </text:p>
                <text:p text:style-name="P3">Para el apartado RA05_d) consulte el epígrafe “6.1 Indumentaria” de la unidad 01.<text:line-break/> </text:p>
                <text:p text:style-name="P3">Para la realización del apartado RA05_h) de la tarea sería de gran ayuda consultar el epígrafe "Prevención de riesgos laborales en los procesos de montaje y mantenimiento".<text:line-break/>Para el apartado RA05_e) consulte el epígrafe “6.2 Herramientas” de la unidad 01.<text:line-break/> </text:p>
                <text:p text:style-name="P3">Sería también de mucha ayuda revisar los capítulos de IT Essentials:<text:line-break/>3.5 Protección del medio ambiente.<text:line-break/>4.1 Mantenimiento preventivo<text:span text:style-name="T3"/></text:p>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15:45.548811100</meta:creation-date>
    <dc:date>2026-06-15T10:16:17.905798500</dc:date>
    <meta:editing-duration>PT32S</meta:editing-duration>
    <meta:editing-cycles>1</meta:editing-cycles>
    <meta:document-statistic meta:table-count="3" meta:image-count="0" meta:object-count="0" meta:page-count="2" meta:paragraph-count="41" meta:word-count="539" meta:character-count="3484" meta:non-whitespace-character-count="2952"/>
    <meta:generator>LibreOffice/26.2.3.2$Windows_X86_64 LibreOffice_project/70e089b17412e4cb7773e41413306b17a2328c34</meta:generator>
  </office:meta>
</office:document-meta>
</file>